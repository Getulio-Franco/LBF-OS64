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Heading_20_4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A Estrutura dos 6 Arquivos do Driver SATA</text:h>
      <text:list text:style-name="L1">
        <text:list-item>
          <text:p text:style-name="P1"><text:span text:style-name="Source_20_Text"><text:span text:style-name="T1">ahci_pci.c</text:span></text:span><text:span text:style-name="T1"> (A Descoberta):</text:span> Cuida exclusivamente de varrer o barramento PCI, achar a controladora SATA, ativar o Bus Master e extrair o endereço físico do BAR5 (ABAR).</text:p>
        </text:list-item>
        <text:list-item>
          <text:p text:style-name="P1"><text:span text:style-name="Source_20_Text"><text:span text:style-name="T1">ahci_vmm.c</text:span></text:span><text:span text:style-name="T1"> (A Proteção de Memória):</text:span> Responsável por conversar com o seu <text:span text:style-name="Source_20_Text">vmm.c</text:span> para mapear a região do BAR5 como não-cacheável (<text:span text:style-name="Source_20_Text">PAGE_PCD</text:span>), garantindo que o Kernel converse com o hardware sem interferência do cache da CPU.</text:p>
        </text:list-item>
        <text:list-item>
          <text:p text:style-name="P1"><text:span text:style-name="Source_20_Text"><text:span text:style-name="T1">ahci_reset.c</text:span></text:span><text:span text:style-name="T1"> (O Reset Físico):</text:span> Cuida da máquina de estados física. Executa o COMRESET na porta SATA, limpa os registradores de erros (<text:span text:style-name="Source_20_Text">SERR</text:span>/<text:span text:style-name="Source_20_Text">IS</text:span>) e aguarda o sinal elétrico do disco responder que está ativo.</text:p>
        </text:list-item>
        <text:list-item>
          <text:p text:style-name="P1"><text:span text:style-name="Source_20_Text"><text:span text:style-name="T1">ahci_mem.c</text:span></text:span><text:span text:style-name="T1"> (O Rebase e Alinhamento):</text:span> Aloca e distribui as tabelas de comando (<text:span text:style-name="Source_20_Text">CLB</text:span>, <text:span text:style-name="Source_20_Text">FB</text:span>, <text:span text:style-name="Source_20_Text">CT</text:span>) na memória RAM de forma estritamente alinhada em fronteiras de página física, blindando o sistema contra <text:span text:style-name="T2">Page Faults</text:span>.</text:p>
        </text:list-item>
        <text:list-item>
          <text:p text:style-name="P1"><text:span text:style-name="Source_20_Text"><text:span text:style-name="T1">ahci_cmd.c</text:span></text:span><text:span text:style-name="T1"> (O Protocolo SATA):</text:span> Constrói as estruturas de comando FIS (Frame Information Structure) para leitura e escrita, além de gerenciar os slots de comando da controladora.</text:p>
        </text:list-item>
        <text:list-item>
          <text:p text:style-name="P1"><text:span text:style-name="Source_20_Text"><text:span text:style-name="T1">ahci_hal.c</text:span></text:span><text:span text:style-name="T1"> (A Integração):</text:span> O arquivo que amarra tudo. Ele inicializa os módulos anteriores na ordem cronológica correta e cria o <text:span text:style-name="T2">wrapper</text:span> que registra o disco na sua HAL (<text:span text:style-name="Source_20_Text">disk_register</text:span>), expondo as funções para o seu FAT32.</text:p>
        </text:list-item>
      </text:list>
      <text:p text:style-name="Text_20_body"/>
      <text:h text:style-name="Heading_20_4" text:outline-level="4">Passo 1: Preparação do Terreno (Antes de tocar no hardware)</text:h>
      <text:list text:style-name="L2">
        <text:list-item>
          <text:p text:style-name="P2"><text:span text:style-name="T1">Parte 5 (Mapeamento Não-Cacheável de MMIO):</text:span> É a primeiríssima coisa. Antes de ler ou escrever qualquer registrador do BAR5, o seu VMM precisa garantir que essa área da memória está mapeada com o cache desativado (<text:span text:style-name="Source_20_Text">PAGE_PCD</text:span>). Se não fizer isso aqui, todos os passos seguintes vão ler dados "fantasmas" do cache da CPU.</text:p>
        </text:list-item>
      </text:list>
      <text:h text:style-name="P3" text:outline-level="4">Passo 2: Tomando o controle da Placa-Mãe</text:h>
      <text:list text:style-name="L3">
        <text:list-item>
          <text:p text:style-name="P4"><text:span text:style-name="T1">Parte 2 (Handshake BIOS/OS):</text:span> Assim que você descobre o BAR5 via PCI, você deve executar o protocolo de transição (Handoff). O seu Kernel "bate na porta" da BIOS e diz: <text:span text:style-name="T2">"Eu sou o Sistema Operacional, me dá o controle do chip SATA agora"</text:span>.</text:p>
        </text:list-item>
      </text:list>
      <text:h text:style-name="P3" text:outline-level="4">Passo 3: Limpando a Controladora</text:h>
      <text:list text:style-name="L4">
        <text:list-item>
          <text:p text:style-name="P5"><text:span text:style-name="T1">Parte 3 (Inicialização Defensiva / Reset):</text:span> Com o controle na mão, você desliga os motores antigos que a BIOS deixou ligados, envia o sinal elétrico de <text:span text:style-name="T1">COMRESET</text:span> para resetar a linha física e limpa todos os registradores de erro e interrupção.</text:p>
        </text:list-item>
      </text:list>
      <text:h text:style-name="P3" text:outline-level="4">Passo 4: Configurando a Estrutura de Memória</text:h>
      <text:list text:style-name="L5">
        <text:list-item>
          <text:p text:style-name="P6"><text:span text:style-name="T1">Parte 1 (Alinhamento Estrito de Memória - Rebase):</text:span> Agora que o chip está resetado e limpo, você configura os ponteiros físicos alinhados (<text:span text:style-name="Source_20_Text">clb</text:span>, <text:span text:style-name="Source_20_Text">fb</text:span>, <text:span text:style-name="Source_20_Text">ct</text:span>) na memória RAM para a estrutura de comandos de cada porta ativa.</text:p>
        </text:list-item>
      </text:list>
      <text:h text:style-name="P3" text:outline-level="4"><text:soft-page-break/>Passo 5: Acordando o Link Físico</text:h>
      <text:list text:style-name="L6">
        <text:list-item>
          <text:p text:style-name="P7"><text:span text:style-name="T1">Parte 4 (Gerenciamento de Energia - Link Ativo):</text:span> Você força o estado da linha para <text:span text:style-name="T1">Active</text:span> (Ativo), garantindo que nem a placa-mãe real e nem o VirtualBox coloquem o disco para "dormir" logo após o reset. Em seguida, você liga os motores de comando (<text:span text:style-name="Source_20_Text">ST</text:span> e <text:span text:style-name="Source_20_Text">FRE</text:span>).</text:p>
        </text:list-item>
      </text:list>
      <text:h text:style-name="P3" text:outline-level="4">Passo 6: A Hora do Show (Leitura/Escrita)</text:h>
      <text:list text:style-name="L7">
        <text:list-item>
          <text:p text:style-name="P8"><text:span text:style-name="T1">Parte 6 (Transferência via PRDT Alinhada):</text:span> Com tudo pronto, quando o Kernel pedir para ler um setor, você monta a tabela PRDT apontando para o buffer alinhado na RAM e dispara o comando de DMA.</text:p>
        </text:list-item>
      </text:list>
      <text:p text:style-name="Text_20_body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Parte 1: Alinhamento Estrito de Memória (O Calcanhar de Aquiles do VirtualBox)</text:h>
      <text:p text:style-name="Text_20_body">O hardware real e o VirtualBox usam buffers de DMA (Acesso Direto à Memória). Eles exigem que as estruturas estejam alinhadas em fronteiras específicas da RAM física. Se houver um desalinhamento de 1 único byte, o PC real trava.</text:p>
      <text:list text:style-name="L8">
        <text:list-item>
          <text:p text:style-name="P9"><text:span text:style-name="T1">Command List Base (CLB):</text:span> Deve estar obrigatoriamente alinhada em <text:span text:style-name="T1">1 KB</text:span>.</text:p>
        </text:list-item>
        <text:list-item>
          <text:p text:style-name="P9"><text:span text:style-name="T1">FIS Receive Base (FB):</text:span> Deve estar obrigatoriamente alinhada em <text:span text:style-name="T1">256 Bytes</text:span>.</text:p>
        </text:list-item>
        <text:list-item>
          <text:p text:style-name="P9"><text:span text:style-name="T1">Command Tables (CT):</text:span> Devem estar alinhadas em <text:span text:style-name="T1">128 Bytes</text:span>.</text:p>
        </text:list-item>
        <text:list-item>
          <text:p text:style-name="P9"><text:span text:style-name="T1">O que fazer:</text:span> Ajustar o seu alocador de memória (<text:span text:style-name="Source_20_Text">pmm_alloc_block</text:span>) para garantir blocos alinhados em 4KB (o que automaticamente satisfaz essas regras).</text:p>
        </text:list-item>
      </text:list>
      <text:h text:style-name="Heading_20_3" text:outline-level="3">Parte 2: Handshake de Propriedade (BIOS/OS Coexistence)</text:h>
      <text:p text:style-name="Text_20_body">Em um PC real ou no VirtualBox, a BIOS da placa-mãe assume o controle da controladora AHCI logo na inicialização. Se o seu Kernel tentar enviar comandos sem "avisar" a placa-mãe, o hardware ignorará o driver.</text:p>
      <text:list text:style-name="L9">
        <text:list-item>
          <text:p text:style-name="P10"><text:span text:style-name="T1">Mecanismo HBA:</text:span> É preciso ler o registrador <text:span text:style-name="Source_20_Text">CAP2</text:span> (Capabilities 2) para ver if o hardware suporta <text:span text:style-name="T2">Bios/OS Coexistence</text:span>.</text:p>
        </text:list-item>
        <text:list-item>
          <text:p text:style-name="P10"><text:span text:style-name="T1">O "Aviso":</text:span> O driver deve setar o bit <text:span text:style-name="Source_20_Text">BOHC</text:span> (BIOS Old Handoff Control) para forçar a BIOS a liberar o controle do chip AHCI para o Kernel.</text:p>
        </text:list-item>
      </text:list>
      <text:h text:style-name="Heading_20_3" text:outline-level="3">Parte 3: Inicialização Defensiva do Hardware (Máquina de Estados)</text:h>
      <text:p text:style-name="Text_20_body">O QEMU aceita comandos imediatamente. Já o hardware real exige um ritual de inicialização físico (spin-up do motor do disco e negociação da velocidade SATA).</text:p>
      <text:list text:style-name="L10">
        <text:list-item>
          <text:p text:style-name="P11"><text:soft-page-break/><text:span text:style-name="T1">Desativação dos Motores:</text:span> Garantir que os bits <text:span text:style-name="Source_20_Text">ST</text:span> (Start) e <text:span text:style-name="Source_20_Text">FRE</text:span> (FIS Receive Enable) estão desligados antes de mexer na memória.</text:p>
        </text:list-item>
        <text:list-item>
          <text:p text:style-name="P11"><text:span text:style-name="T1">COMRESET Real:</text:span> Enviar um sinal elétrico de reset via registrador <text:span text:style-name="Source_20_Text">SCTL</text:span> e aguardar o hardware responder no registrador <text:span text:style-name="Source_20_Text">SSTS</text:span> que detectou a presença do disco (<text:span text:style-name="Source_20_Text">0x3</text:span>).</text:p>
        </text:list-item>
        <text:list-item>
          <text:p text:style-name="P11"><text:span text:style-name="T1">Limpeza de Resíduos:</text:span> Limpar os registradores de erro (<text:span text:style-name="Source_20_Text">SERR</text:span>) e de interrupção (<text:span text:style-name="Source_20_Text">IS</text:span>) <text:span text:style-name="T2">antes</text:span> de ligar os motores.</text:p>
        </text:list-item>
      </text:list>
      <text:h text:style-name="Heading_20_3" text:outline-level="3">Parte 4: Gerenciamento Avançado de Energia (SATA Aggressive Link)</text:h>
      <text:p text:style-name="Text_20_body">Muitas placas-mães reais e o VirtualBox colocam as portas SATA em modo de economia de energia por padrão (Partial ou Slumber). Se o disco estiver "dormindo", a leitura falhará por <text:span text:style-name="T2">Timeout</text:span>.</text:p>
      <text:list text:style-name="L11">
        <text:list-item>
          <text:p text:style-name="P12"><text:span text:style-name="T1">O que fazer:</text:span> O driver deve configurar explicitamente o registrador <text:span text:style-name="Source_20_Text">SCTL.IPM</text:span> para desativar o gerenciamento de energia agressivo durante a inicialização, forçando o link físico a ficar no estado <text:span text:style-name="T1">Active</text:span> (Ativo).</text:p>
        </text:list-item>
      </text:list>
      <text:h text:style-name="Heading_20_3" text:outline-level="3">Parte 5: Mapeamento Não-Cacheável de MMIO (VMM/Paging)</text:h>
      <text:p text:style-name="Text_20_body">As comunicações com o chip AHCI ocorrem via BAR5 (endereço físico de memória mapeada em I/O). O seu Kernel usa paginação (<text:span text:style-name="Source_20_Text">vmm.c</text:span>). Se a memória do BAR5 for mapeada com cache ativo pela CPU, as escritas do Kernel ficarão presas no cache L1/L2 e não chegarão ao chip AHCI.</text:p>
      <text:list text:style-name="L12">
        <text:list-item>
          <text:p text:style-name="P13"><text:span text:style-name="T1">O que fazer:</text:span> No seu <text:span text:style-name="Source_20_Text">vmm.c</text:span>, a região do BAR5 deve ser mapeada usando as flags <text:span text:style-name="Source_20_Text"><text:span text:style-name="T1">PAGE_PCD</text:span></text:span><text:span text:style-name="T1"> (Page Cache Disable)</text:span> e <text:span text:style-name="Source_20_Text"><text:span text:style-name="T1">PAGE_PWT</text:span></text:span><text:span text:style-name="T1"> (Page Writethrough)</text:span>. Isso garante que cada escrita no código altere o hardware instantaneamente.</text:p>
        </text:list-item>
      </text:list>
      <text:h text:style-name="Heading_20_3" text:outline-level="3">Parte 6: Transferência de Dados via PRDT Alinhada</text:h>
      <text:p text:style-name="Text_20_body">A tabela de descrição de região física (PRDT) aponta para o buffer onde os setores do disco serão jogados.</text:p>
      <text:list text:style-name="L13">
        <text:list-item>
          <text:p text:style-name="P14"><text:span text:style-name="T1">Regra do Hardware:</text:span> O endereço do buffer onde o Kernel quer receber os dados (o ponteiro <text:span text:style-name="Source_20_Text">void* buffer</text:span> passado na função de leitura) <text:span text:style-name="T1">também</text:span> precisa estar alinhado na memória física. Se o buffer começar em um endereço ímpar, o controlador DMA do PC real falhará de forma catastrófica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4.2$Linux_X86_64 LibreOffice_project/580$Build-2</meta:generator>
    <dc:date>2026-05-20T17:05:52.323561701</dc:date>
    <meta:editing-duration>PT7M51S</meta:editing-duration>
    <meta:editing-cycles>3</meta:editing-cycles>
    <meta:document-statistic meta:table-count="0" meta:image-count="0" meta:object-count="0" meta:page-count="3" meta:paragraph-count="43" meta:word-count="1047" meta:character-count="6198" meta:non-whitespace-character-count="5218"/>
  </office:meta>
</office:document-meta>
</file>