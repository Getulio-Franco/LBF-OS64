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0B000001EDD6A31304.png" manifest:media-type="image/png"/>
  <manifest:file-entry manifest:full-path="Pictures/100000010000020E000001C03F5E7B52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Google Sans Text" svg:font-family="'Google Sans Text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ela1" style:family="table">
      <style:table-properties style:width="17cm" table:align="left"/>
    </style:style>
    <style:style style:name="Tabela1.A" style:family="table-column">
      <style:table-column-properties style:column-width="1.963cm"/>
    </style:style>
    <style:style style:name="Tabela1.B" style:family="table-column">
      <style:table-column-properties style:column-width="3.53cm"/>
    </style:style>
    <style:style style:name="Tabela1.C" style:family="table-column">
      <style:table-column-properties style:column-width="11.508cm"/>
    </style:style>
    <style:style style:name="Tabela1.A1" style:family="table-cell">
      <style:table-cell-properties style:vertical-align="middle" fo:padding-left="0.318cm" fo:padding-right="0.318cm" fo:padding-top="0.212cm" fo:padding-bottom="0.212cm" fo:border="0.05pt solid #c4c7c5"/>
    </style:style>
    <style:style style:name="P1" style:family="paragraph" style:parent-style-name="Table_20_Contents">
      <style:paragraph-properties fo:margin-left="0cm" fo:margin-right="0cm" fo:margin-top="0cm" fo:margin-bottom="0cm" style:contextual-spacing="false" fo:line-height="114%" fo:text-indent="0cm" style:auto-text-indent="false"/>
    </style:style>
    <style:style style:name="P2" style:family="paragraph" style:parent-style-name="Table_20_Contents">
      <style:paragraph-properties fo:margin-left="0cm" fo:margin-right="0cm" fo:margin-top="0cm" fo:margin-bottom="0.247cm" style:contextual-spacing="false" fo:line-height="114%" fo:text-indent="0cm" style:auto-text-indent="false"/>
      <style:text-properties style:font-name="Google Sans Text" fo:font-weight="bold"/>
    </style:style>
    <style:style style:name="P3" style:family="paragraph" style:parent-style-name="Table_20_Contents">
      <style:paragraph-properties fo:margin-left="0cm" fo:margin-right="0cm" fo:margin-top="0cm" fo:margin-bottom="0.247cm" style:contextual-spacing="false" fo:line-height="114%" fo:text-indent="0cm" style:auto-text-indent="false"/>
    </style:style>
    <style:style style:name="P4" style:family="paragraph" style:parent-style-name="Table_20_Contents">
      <style:paragraph-properties fo:margin-left="0cm" fo:margin-right="0cm" fo:margin-top="0cm" fo:margin-bottom="0.247cm" style:contextual-spacing="false" fo:line-height="114%" fo:text-indent="0cm" style:auto-text-indent="false"/>
      <style:text-properties style:font-name="Google Sans Text"/>
    </style:style>
    <style:style style:name="P5" style:family="paragraph" style:parent-style-name="Standard">
      <style:text-properties officeooo:paragraph-rsid="00100239"/>
    </style:style>
    <style:style style:name="P6" style:family="paragraph" style:parent-style-name="Standard">
      <style:text-properties officeooo:paragraph-rsid="0010c46b"/>
    </style:style>
    <style:style style:name="P7" style:family="paragraph" style:parent-style-name="Standard">
      <style:text-properties officeooo:paragraph-rsid="0012889d"/>
    </style:style>
    <style:style style:name="P8" style:family="paragraph" style:parent-style-name="Standard">
      <style:text-properties officeooo:paragraph-rsid="0012c685"/>
    </style:style>
    <style:style style:name="P9" style:family="paragraph" style:parent-style-name="Heading_20_2">
      <style:text-properties officeooo:paragraph-rsid="0012c685"/>
    </style:style>
    <style:style style:name="P10" style:family="paragraph" style:parent-style-name="Heading_20_3">
      <style:text-properties officeooo:paragraph-rsid="0012c685"/>
    </style:style>
    <style:style style:name="P11" style:family="paragraph" style:parent-style-name="Text_20_body" style:list-style-name="L1"/>
    <style:style style:name="P12" style:family="paragraph" style:parent-style-name="Text_20_body" style:list-style-name="L2"/>
    <style:style style:name="P13" style:family="paragraph" style:parent-style-name="Standard">
      <style:text-properties officeooo:rsid="0023baee" officeooo:paragraph-rsid="00257ff9"/>
    </style:style>
    <style:style style:name="P14" style:family="paragraph" style:parent-style-name="Text_20_body" style:list-style-name="L3"/>
    <style:style style:name="P15" style:family="paragraph" style:parent-style-name="Text_20_body">
      <style:text-properties officeooo:rsid="0023baee"/>
    </style:style>
    <style:style style:name="P16" style:family="paragraph" style:parent-style-name="Standard">
      <style:text-properties officeooo:rsid="0023baee" officeooo:paragraph-rsid="0023baee"/>
    </style:style>
    <style:style style:name="T1" style:family="text">
      <style:text-properties style:font-name="Google Sans Text"/>
    </style:style>
    <style:style style:name="T2" style:family="text">
      <style:text-properties fo:font-weight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🏗️ 3. Arquitetura Profunda do Sistema (<text:span text:style-name="Source_20_Text">03_architecture</text:span>)</text:h>
      <text:p text:style-name="Text_20_body">O LBF OS divide estritamente os privilégios da máquina para garantir robustez e segurança, operando em duas camadas de anéis da CPU x86_64:</text:p>
      <text:p text:style-name="Standard"><draw:frame draw:style-name="fr1" draw:name="Figura1" text:anchor-type="char" svg:x="1.542cm" svg:y="0.191cm" svg:width="13.917cm" svg:height="11.853cm" draw:z-index="0"><draw:image xlink:href="Pictures/100000010000020E000001C03F5E7B52.png" xlink:type="simple" xlink:show="embed" xlink:actuate="onLoad" draw:mime-type="image/png"/></draw:frame><text:line-break/></text:p>
      <text:p text:style-name="Standard"/>
      <text:h text:style-name="Heading_20_3" text:outline-level="3">🔴 Kernel / S.O. (Ring 0) — Sistema Independente</text:h>
      <text:p text:style-name="Text_20_body">O Kernel é totalmente autônomo. Ao ligar a máquina, se o subsistema gráfico não for carregado, o Kernel expõe um Terminal CLI interativo capaz de navegar pelo sistema de arquivos, executar utilitários e gerenciar periféricos de hardware diretamente. Suas atribuições envolvem controle total do espaço de endereçamento linear, paginação por processo, interrupções físicas e escalonamento preemptivo de tarefas.</text:p>
      <text:h text:style-name="Heading_20_3" text:outline-level="3">🟡 <text:span text:style-name="Source_20_Text">liblib.h</text:span> — SDK do Sistema (Ring 3 API)</text:h>
      <text:p text:style-name="Text_20_body">Trata-se da camada de abstração mínima obrigatória. Ao invés de adotar o padrão complexo do POSIX, o LBF OS define uma API enxuta exposta diretamente através do vetor de interrupções <text:span text:style-name="Source_20_Text">int 0x80</text:span>.</text:p>
      <text:p text:style-name="Standard"/>
      <table:table table:name="Tabela1" table:style-name="Tabela1">
        <table:table-column table:style-name="Tabela1.A"/>
        <table:table-column table:style-name="Tabela1.B"/>
        <table:table-column table:style-name="Tabela1.C"/>
        <table:table-header-rows>
          <table:table-row>
            <table:table-cell table:style-name="Tabela1.A1" office:value-type="string">
              <text:p text:style-name="P1"><text:span text:style-name="Strong_20_Emphasis"><text:span text:style-name="T1">Syscall ID</text:span></text:span></text:p>
            </table:table-cell>
            <table:table-cell table:style-name="Tabela1.A1" office:value-type="string">
              <text:p text:style-name="P1"><text:span text:style-name="Strong_20_Emphasis"><text:span text:style-name="T1">Nome da Função</text:span></text:span></text:p>
            </table:table-cell>
            <table:table-cell table:style-name="Tabela1.A1" office:value-type="string">
              <text:p text:style-name="P1"><text:span text:style-name="Strong_20_Emphasis"><text:span text:style-name="T1">Descrição Técnica</text:span></text:span></text:p>
            </table:table-cell>
          </table:table-row>
        </table:table-header-rows>
        <table:table-row>
          <table:table-cell table:style-name="Tabela1.A1" office:value-type="string">
            <text:p text:style-name="P2">1</text:p>
          </table:table-cell>
          <table:table-cell table:style-name="Tabela1.A1" office:value-type="string">
            <text:p text:style-name="P3"><text:span text:style-name="Source_20_Text"><text:span text:style-name="T1">sys_open</text:span></text:span></text:p>
          </table:table-cell>
          <table:table-cell table:style-name="Tabela1.A1" office:value-type="string">
            <text:p text:style-name="P4">Abre um descritor de arquivo na tabela do VFS através do FAT32.</text:p>
          </table:table-cell>
        </table:table-row>
        <table:table-row>
          <table:table-cell table:style-name="Tabela1.A1" office:value-type="string">
            <text:p text:style-name="P2">2</text:p>
          </table:table-cell>
          <table:table-cell table:style-name="Tabela1.A1" office:value-type="string">
            <text:p text:style-name="P3"><text:span text:style-name="Source_20_Text"><text:span text:style-name="T1">sys_read</text:span></text:span></text:p>
          </table:table-cell>
          <table:table-cell table:style-name="Tabela1.A1" office:value-type="string">
            <text:p text:style-name="P4">Lê fluxos de dados de arquivos ou dispositivos de E/S.</text:p>
          </table:table-cell>
        </table:table-row>
        <table:table-row>
          <table:table-cell table:style-name="Tabela1.A1" office:value-type="string">
            <text:p text:style-name="P2">3</text:p>
          </table:table-cell>
          <table:table-cell table:style-name="Tabela1.A1" office:value-type="string">
            <text:p text:style-name="P3"><text:span text:style-name="Source_20_Text"><text:span text:style-name="T1">sys_write</text:span></text:span></text:p>
          </table:table-cell>
          <table:table-cell table:style-name="Tabela1.A1" office:value-type="string">
            <text:p text:style-name="P4">Escreve dados em arquivos, terminais ou buffers de memória.</text:p>
          </table:table-cell>
        </table:table-row>
        <table:table-row>
          <table:table-cell table:style-name="Tabela1.A1" office:value-type="string">
            <text:p text:style-name="P2">19</text:p>
          </table:table-cell>
          <table:table-cell table:style-name="Tabela1.A1" office:value-type="string">
            <text:p text:style-name="P3"><text:span text:style-name="Source_20_Text"><text:span text:style-name="T1">sys_exec</text:span></text:span></text:p>
          </table:table-cell>
          <table:table-cell table:style-name="Tabela1.A1" office:value-type="string">
            <text:p text:style-name="P3"><text:span text:style-name="T1">Cria e enfileira um processo assíncrono via </text:span><text:span text:style-name="Source_20_Text"><text:span text:style-name="T1">task_d</text:span></text:span><text:span text:style-name="T1">, preservando o estado do chamador.</text:span></text:p>
          </table:table-cell>
        </table:table-row>
        <table:table-row>
          <table:table-cell table:style-name="Tabela1.A1" office:value-type="string">
            <text:p text:style-name="P2">21</text:p>
          </table:table-cell>
          <table:table-cell table:style-name="Tabela1.A1" office:value-type="string">
            <text:p text:style-name="P3"><text:span text:style-name="Source_20_Text"><text:span text:style-name="T1">sys_exit</text:span></text:span></text:p>
          </table:table-cell>
          <table:table-cell table:style-name="Tabela1.A1" office:value-type="string">
            <text:p text:style-name="P4">Encerra o processo corrente, limpando a tabela CR3 e retornando o foco ao pai.</text:p>
          </table:table-cell>
        </table:table-row>
        <table:table-row>
          <table:table-cell table:style-name="Tabela1.A1" office:value-type="string">
            <text:p text:style-name="P2">22</text:p>
          </table:table-cell>
          <table:table-cell table:style-name="Tabela1.A1" office:value-type="string">
            <text:p text:style-name="P3"><text:span text:style-name="Source_20_Text"><text:span text:style-name="T1">sys_kill</text:span></text:span></text:p>
          </table:table-cell>
          <table:table-cell table:style-name="Tabela1.A1" office:value-type="string">
            <text:p text:style-name="P4">Envia um sinal de terminação forçada a um PID específico.</text:p>
          </table:table-cell>
        </table:table-row>
        <table:table-row>
          <table:table-cell table:style-name="Tabela1.A1" office:value-type="string">
            <text:p text:style-name="P2">23</text:p>
          </table:table-cell>
          <table:table-cell table:style-name="Tabela1.A1" office:value-type="string">
            <text:p text:style-name="P3"><text:span text:style-name="Source_20_Text"><text:span text:style-name="T1">sys_get_pid</text:span></text:span></text:p>
          </table:table-cell>
          <table:table-cell table:style-name="Tabela1.A1" office:value-type="string">
            <text:p text:style-name="P4">Obtém o identificador numérico do processo em execução.</text:p>
          </table:table-cell>
        </table:table-row>
        <table:table-row>
          <table:table-cell table:style-name="Tabela1.A1" office:value-type="string">
            <text:p text:style-name="P2">25</text:p>
          </table:table-cell>
          <table:table-cell table:style-name="Tabela1.A1" office:value-type="string">
            <text:p text:style-name="P3"><text:span text:style-name="Source_20_Text"><text:span text:style-name="T1">sys_sbrk</text:span></text:span></text:p>
          </table:table-cell>
          <table:table-cell table:style-name="Tabela1.A1" office:value-type="string">
            <text:p text:style-name="P4">Incrementa o limite do heap dinâmico alocado para a aplicação de usuário.</text:p>
          </table:table-cell>
        </table:table-row>
        <table:table-row>
          <table:table-cell table:style-name="Tabela1.A1" office:value-type="string">
            <text:p text:style-name="P2">30</text:p>
          </table:table-cell>
          <table:table-cell table:style-name="Tabela1.A1" office:value-type="string">
            <text:p text:style-name="P3"><text:span text:style-name="Source_20_Text"><text:span text:style-name="T1">sys_sleep</text:span></text:span></text:p>
          </table:table-cell>
          <table:table-cell table:style-name="Tabela1.A1" office:value-type="string">
            <text:p text:style-name="P4">Coloca a task em modo de espera com base nos ticks do sistema.</text:p>
          </table:table-cell>
        </table:table-row>
        <table:table-row>
          <table:table-cell table:style-name="Tabela1.A1" office:value-type="string">
            <text:p text:style-name="P2">31</text:p>
          </table:table-cell>
          <table:table-cell table:style-name="Tabela1.A1" office:value-type="string">
            <text:p text:style-name="P3"><text:span text:style-name="Source_20_Text"><text:span text:style-name="T1">sys_get_ticks</text:span></text:span></text:p>
          </table:table-cell>
          <table:table-cell table:style-name="Tabela1.A1" office:value-type="string">
            <text:p text:style-name="P4">Retorna o contador total de milissegundos do PIT desde o boot.</text:p>
          </table:table-cell>
        </table:table-row>
        <table:table-row>
          <table:table-cell table:style-name="Tabela1.A1" office:value-type="string">
            <text:p text:style-name="P2">40</text:p>
          </table:table-cell>
          <table:table-cell table:style-name="Tabela1.A1" office:value-type="string">
            <text:p text:style-name="P3"><text:span text:style-name="Source_20_Text"><text:span text:style-name="T1">video_flip</text:span></text:span></text:p>
          </table:table-cell>
          <table:table-cell table:style-name="Tabela1.A1" office:value-type="string">
            <text:p text:style-name="P4">Aciona o chaveamento de buffers do compositor direto na VRAM.</text:p>
          </table:table-cell>
        </table:table-row>
        <table:table-row>
          <table:table-cell table:style-name="Tabela1.A1" office:value-type="string">
            <text:p text:style-name="P2">41</text:p>
          </table:table-cell>
          <table:table-cell table:style-name="Tabela1.A1" office:value-type="string">
            <text:p text:style-name="P3"><text:span text:style-name="Source_20_Text"><text:span text:style-name="T1">get_mouse</text:span></text:span></text:p>
          </table:table-cell>
          <table:table-cell table:style-name="Tabela1.A1" office:value-type="string">
            <text:p text:style-name="P4">Lê o estado do buffer de posição e botões do mouse PS/2.</text:p>
          </table:table-cell>
        </table:table-row>
        <text:soft-page-break/>
        <table:table-row>
          <table:table-cell table:style-name="Tabela1.A1" office:value-type="string">
            <text:p text:style-name="P2">42</text:p>
          </table:table-cell>
          <table:table-cell table:style-name="Tabela1.A1" office:value-type="string">
            <text:p text:style-name="P3"><text:span text:style-name="Source_20_Text"><text:span text:style-name="T1">get_key</text:span></text:span></text:p>
          </table:table-cell>
          <table:table-cell table:style-name="Tabela1.A1" office:value-type="string">
            <text:p text:style-name="P4">Captura o caractere ASCII disponível na fila do teclado.</text:p>
          </table:table-cell>
        </table:table-row>
        <table:table-row>
          <table:table-cell table:style-name="Tabela1.A1" office:value-type="string">
            <text:p text:style-name="P2">50</text:p>
          </table:table-cell>
          <table:table-cell table:style-name="Tabela1.A1" office:value-type="string">
            <text:p text:style-name="P3"><text:span text:style-name="Source_20_Text"><text:span text:style-name="T1">sys_serial_open</text:span></text:span></text:p>
          </table:table-cell>
          <table:table-cell table:style-name="Tabela1.A1" office:value-type="string">
            <text:p text:style-name="P4">Inicializa e abre a porta serial UART nativa para escuta/envio.</text:p>
          </table:table-cell>
        </table:table-row>
        <table:table-row>
          <table:table-cell table:style-name="Tabela1.A1" office:value-type="string">
            <text:p text:style-name="P2">51</text:p>
          </table:table-cell>
          <table:table-cell table:style-name="Tabela1.A1" office:value-type="string">
            <text:p text:style-name="P3"><text:span text:style-name="Source_20_Text"><text:span text:style-name="T1">sys_serial_write</text:span></text:span></text:p>
          </table:table-cell>
          <table:table-cell table:style-name="Tabela1.A1" office:value-type="string">
            <text:p text:style-name="P4">Envia bytes de dados diretamente para o barramento UART (ex: comandos pro Arduino).</text:p>
          </table:table-cell>
        </table:table-row>
        <table:table-row>
          <table:table-cell table:style-name="Tabela1.A1" office:value-type="string">
            <text:p text:style-name="P2">52</text:p>
          </table:table-cell>
          <table:table-cell table:style-name="Tabela1.A1" office:value-type="string">
            <text:p text:style-name="P3"><text:span text:style-name="Source_20_Text"><text:span text:style-name="T1">sys_serial_read</text:span></text:span></text:p>
          </table:table-cell>
          <table:table-cell table:style-name="Tabela1.A1" office:value-type="string">
            <text:p text:style-name="P4">Retorna o conteúdo lido no buffer circular receptor do chip serial.</text:p>
          </table:table-cell>
        </table:table-row>
      </table:table>
      <text:p text:style-name="Standard"/>
      <text:p text:style-name="Standard"/>
      <text:h text:style-name="Heading_20_3" text:outline-level="3">🟢 <text:span text:style-name="Source_20_Text">Explorer.elf</text:span> — O Coração do Userland Gráfico</text:h>
      <text:p text:style-name="Text_20_body">O <text:span text:style-name="Source_20_Text">Explorer.elf</text:span> roda inteiramente em Ring 3, mas possui um papel de privilégio lógico no ambiente gráfico. Ele atua como um <text:span text:style-name="T2">Servidor de Janelas e Compositor</text:span>. Nenhum aplicativo de usuário escreve diretamente na tela da máquina; em vez disso, todos operam de forma isolada, gerando seus pixels dentro de buffers locais na memória RAM. O Explorer varre estes buffers, calcula as interações gráficas e injeta a imagem final na VRAM de maneira unificada.</text:p>
      <text:h text:style-name="Heading_20_3" text:outline-level="3">🟣 Runtime GUI — Sistema de Interface Gráfica RAD</text:h>
      <text:p text:style-name="Text_20_body">Inspirado na arquitetura clássica da VCL do Delphi 7, este subsistema disponibiliza componentes prontos de alto nível em formato Orientado a Objetos estrutural em C. O desenvolvedor não precisa escrever código para desenhar botões, checar cliques ou gerenciar pixels na tela: ele apenas cria uma instância de <text:span text:style-name="Source_20_Text">TForm</text:span>, adiciona os controles (<text:span text:style-name="Source_20_Text">TButton</text:span>, <text:span text:style-name="Source_20_Text">TEdit</text:span>, <text:span text:style-name="Source_20_Text">TMemo</text:span>, etc.) e define as funções de tratamento de eventos. A biblioteca interna gerencia o ciclo de vida visual e comunica-se de forma assíncrona com o compositor.</text:p>
      <text:h text:style-name="Heading_20_3" text:outline-level="3">🔵 Runtime IA — Camada de Inteligência Artificial</text:h>
      <text:p text:style-name="Text_20_body">Integrado nativamente ao ecossistema do Runtime do sistema operacional, esta camada manipula redes neurais lógicas primitivas salvando "pesos e neurônios" em arquivos de texto puros dentro do sistema FAT32. O sistema é capaz de realizar aprendizado incremental em tempo de execução, remontando e recompilando dinamicamente módulos de conhecimento em estruturas executáveis integradas diretamente ao fluxo lógico do software.</text:p>
      <text:h text:style-name="Heading_20_2" text:outline-level="2">🚀 4. Sequência Real de Execução (<text:span text:style-name="Source_20_Text">04_boot_process</text:span>)</text:h>
      <text:p text:style-name="Text_20_body">O processo de inicialização do LBF OS contorna as barreiras legadas da arquitetura x86 através de um pipeline estruturado em cinco fases distintas:</text:p>
      <text:p text:style-name="P5"><text:soft-page-break/>[ MODO REAL - 16 BITS ] └── boot.asm: Carrega o setor de boot MBR (Setor 0), inicializa os registradores base de segmento, lê os setores adicionais do disco FAT32 trazendo o resto do sistema para a memória RAM e salta para o kernel asm.</text:p>
      <text:p text:style-name="P5">↓</text:p>
      <text:p text:style-name="P6">[ MODO PROTEGIDO - 32 BITS ] └── kernel.asm: Desativa as interrupções do BIOS (cli), monta uma GDT (Global Descriptor Table) temporária de 32 bits, habilita o pino A20, chaveia o bit PE do registrador CR0 e salta para o modo protegido de 32 bits.</text:p>
      <text:p text:style-name="P6">↓</text:p>
      <text:p text:style-name="P7">[ MODO LONGO - 64 BITS ] └── Paging Setup: Cria as estruturas de tabelas de páginas de 4 níveis (PML4, PDPT, PD, PT), aponta o registrador CR3 para a base da PML4, ativa o suporte a Long Mode no registrador MSR (EFER), liga a paginação no CR0 e faz o jump de transição para o código de 64 bits puro.</text:p>
      <text:p text:style-name="P7">↓</text:p>
      <text:p text:style-name="P8">[ C KERNEL ENTRY POINT ] └── kernel.c: Configura a GDT oficial de 64 bits, reconstrói o vetor IDT mapeando as IRQs físicas do PIC, inicializa os gerenciadores PMM (Gerenciador de Páginas Físicas), VMM (Paginação Virtual de Memória) e cria o Heap do kernel (KMALLOC).</text:p>
      <text:p text:style-name="P8">↓</text:p>
      <text:p text:style-name="P8">[ SUBSISTEMAS E DRIVERS ] └── Hardware Init: Acorda e mapeia os controladores SATA AHCI, inicializa as portas seriais UART, os drivers de mouse/teclado PS/2 e o sistema VFS sobre o disco FAT32. Por fim, inicializa o Escalonador de Processos disparando as tarefas em background (como a `task_d`) e ativa as interrupções globais (sti).</text:p>
      <text:p text:style-name="P8"/>
      <text:h text:style-name="P9" text:outline-level="2">📦 5. Modelo de Execução por Containers (<text:span text:style-name="Source_20_Text">05_container</text:span>)</text:h>
      <text:p text:style-name="Text_20_body">No LBF OS, as aplicações executadas em ambiente visual adotam um modelo rígido de isolamento por <text:span text:style-name="T2">Containers</text:span>. Uma aplicação gráfica <text:span text:style-name="Source_20_Text">.elf</text:span> não tem consciência da existência das outras janelas e é impedida de alterar o estado de renderização de forma global.</text:p>
      <text:h text:style-name="Heading_20_3" text:outline-level="3">Arquitetura do Container</text:h>
      <text:p text:style-name="Text_20_body">Toda janela criada é registrada no <text:span text:style-name="Source_20_Text">Explorer.elf</text:span> por meio de uma estrutura interna que gerencia seu ciclo de vida lógico e físico:</text:p>
      <text:p text:style-name="P8">typedef struct {</text:p>
      <text:p text:style-name="P8"><text:s text:c="4"/>int id; <text:s text:c="17"/>// Identificador exclusivo do container gráfico</text:p>
      <text:p text:style-name="P8"><text:s text:c="4"/>int x; <text:s text:c="18"/>// Posição horizontal no Desktop pixel-space</text:p>
      <text:p text:style-name="P8"><text:s text:c="4"/>int y; <text:s text:c="18"/>// Posição vertical no Desktop pixel-space</text:p>
      <text:p text:style-name="P8"><text:s text:c="4"/>int width; <text:s text:c="14"/>// Largura real do buffer da aplicação</text:p>
      <text:p text:style-name="P8"><text:s text:c="4"/>int height; <text:s text:c="13"/>// Altura real do buffer da aplicação</text:p>
      <text:p text:style-name="P8"><text:s text:c="4"/>int z_order; <text:s text:c="12"/>// Índice de profundidade para sobreposição de camadas</text:p>
      <text:p text:style-name="P8"><text:s text:c="4"/>bool visible; <text:s text:c="11"/>// Flag de visibilidade ativa no compositor</text:p>
      <text:p text:style-name="P8"><text:s text:c="4"/>bool focused; <text:s text:c="11"/>// Flag indicadora de foco ativo de entrada</text:p>
      <text:p text:style-name="P8"><text:s text:c="4"/>uint32_t* rambuffer; <text:s text:c="4"/>// Ponteiro da memória RAM onde a aplicação deposita seus pixels</text:p>
      <text:p text:style-name="P8"><text:s text:c="4"/>process_t* process; <text:s text:c="5"/>// Link direto para a estrutura do processo gerenciada pelo Kernel</text:p>
      <text:p text:style-name="P8">} container_t;</text:p>
      <text:p text:style-name="P8"/>
      <text:h text:style-name="P10" text:outline-level="3">Ciclo de Vida do Processo Gráfico</text:h>
      <text:list text:style-name="L1">
        <text:list-item>
          <text:p text:style-name="P11"><text:span text:style-name="T2">Instanciação:</text:span> O usuário clica em um software ou digita um comando executável. A chamada <text:span text:style-name="Source_20_Text">sys_exec</text:span> gera o processo.</text:p>
        </text:list-item>
        <text:list-item>
          <text:p text:style-name="P11"><text:soft-page-break/><text:span text:style-name="T2">Alocação de Isolamento:</text:span> O <text:span text:style-name="Source_20_Text">Explorer.elf</text:span> detecta o nascimento da aplicação, gera um ID único e aloca uma área na memória RAM isolada (<text:span text:style-name="Source_20_Text">rambuffer</text:span>) proporcional às dimensões da janela da aplicação.</text:p>
        </text:list-item>
        <text:list-item>
          <text:p text:style-name="P11"><text:span text:style-name="T2">Redirecionamento de Input:</text:span> Quando o mouse se move ou um clique é acionado, o <text:span text:style-name="Source_20_Text">Explorer.elf</text:span> avalia qual container está interceptando as coordenadas da tela com base na profundidade (<text:span text:style-name="Source_20_Text">z_order</text:span>). O evento de entrada é empacotado e enviado via IPC exclusivamente para aquele container.</text:p>
        </text:list-item>
        <text:list-item>
          <text:p text:style-name="P11"><text:span text:style-name="T2">Destruição Segura:</text:span> Ao encerrar (via <text:span text:style-name="Source_20_Text">sys_exit</text:span> ou interrupção forçada), o Kernel remove o processo do Scheduler e notifica o Explorer, que imediatamente desaloca a memória do <text:span text:style-name="Source_20_Text">rambuffer</text:span>, limpa seu índice do gerenciador de camadas e atualiza a exibição visual da tela sem deixar rastros na memória do sistema.</text:p>
        </text:list-item>
      </text:list>
      <text:h text:style-name="P9" text:outline-level="2">🖥️ 6. Subsistema de Vídeo e Composição (<text:span text:style-name="Source_20_Text">06_explorer</text:span>)</text:h>
      <text:p text:style-name="Text_20_body">O <text:span text:style-name="Source_20_Text">Explorer.elf</text:span> gerencia o pipeline visual utilizando um modelo inspirado nos conceitos modernos de servidores gráficos assíncronos (como o Wayland), garantindo atualizações livres de artefatos visuais e rasgos de renderização (screen tearing).</text:p>
      <text:p text:style-name="P8"><draw:frame draw:style-name="fr2" draw:name="Figura2" text:anchor-type="char" svg:width="13.838cm" svg:height="13.044cm" draw:z-index="1"><draw:image xlink:href="Pictures/100000010000020B000001EDD6A31304.png" xlink:type="simple" xlink:show="embed" xlink:actuate="onLoad" draw:mime-type="image/png"/></draw:frame></text:p>
      <text:p text:style-name="P8"/>
      <text:p text:style-name="P8"/>
      <text:p text:style-name="P8"/>
      <text:h text:style-name="P10" text:outline-level="3"><text:soft-page-break/>🧠 Mecanismo de Foco Unificado do <text:span text:style-name="Source_20_Text">SYS_EXEC</text:span></text:h>
      <text:p text:style-name="Text_20_body">O refinamento arquitetural unificou a inicialização assíncrona de processos através do tratamento no arquivo <text:span text:style-name="Source_20_Text">proc.c</text:span> disparado de dentro do loop infinito da <text:span text:style-name="Source_20_Text">task_d</text:span>:</text:p>
      <text:p text:style-name="P8">void process_spawn_pending() {</text:p>
      <text:p text:style-name="P8"><text:s text:c="4"/>if (!tem_pedido_exec) return;</text:p>
      <text:p text:style-name="P8"/>
      <text:p text:style-name="P8"><text:s text:c="4"/>char caminho_local[128];</text:p>
      <text:p text:style-name="P8"><text:s text:c="4"/>uint64_t pid_do_pai = 0;</text:p>
      <text:p text:style-name="P8"><text:s text:c="4"/></text:p>
      <text:p text:style-name="P8"><text:s text:c="4"/>__asm__ volatile("cli");</text:p>
      <text:p text:style-name="P8"><text:s text:c="4"/>if (!tem_pedido_exec) {</text:p>
      <text:p text:style-name="P8"><text:s text:c="8"/>__asm__ volatile("sti");</text:p>
      <text:p text:style-name="P8"><text:s text:c="8"/>return;</text:p>
      <text:p text:style-name="P8"><text:s text:c="4"/>}</text:p>
      <text:p text:style-name="P8"><text:s text:c="4"/></text:p>
      <text:p text:style-name="P8"><text:s text:c="4"/>strcpy(caminho_local, pendente_exec_path);</text:p>
      <text:p text:style-name="P8"><text:s text:c="4"/>pid_do_pai = pai_solicitante_pid; // Captura quem postou a requisição</text:p>
      <text:p text:style-name="P8"/>
      <text:p text:style-name="P8"><text:s text:c="4"/>memset(pendente_exec_path, 0, sizeof(pendente_exec_path));</text:p>
      <text:p text:style-name="P8"><text:s text:c="4"/>pai_solicitante_pid = 0;</text:p>
      <text:p text:style-name="P8"><text:s text:c="4"/>tem_pedido_exec = false;</text:p>
      <text:p text:style-name="P8"><text:s text:c="4"/>__asm__ volatile("sti"); </text:p>
      <text:p text:style-name="P8"/>
      <text:p text:style-name="P8"><text:s text:c="4"/>// O disco realiza o carregamento do binário ELF de forma segura com interrupções ligadas</text:p>
      <text:p text:style-name="P8"><text:s text:c="4"/>uint64_t pid_filho = create_elf_process(caminho_local);</text:p>
      <text:p text:style-name="P8"/>
      <text:p text:style-name="P8"><text:s text:c="4"/>// Gestão de foco e chaveamento de contexto automatizado</text:p>
      <text:p text:style-name="P8"><text:s text:c="4"/>if (pid_filho != (uint64_t)-1) {</text:p>
      <text:p text:style-name="P8"><text:s text:c="8"/>process_t* proc_filho = find_process_by_pid(pid_filho);</text:p>
      <text:p text:style-name="P8"><text:s text:c="8"/>process_t* proc_pai = find_process_by_pid(pid_do_pai);</text:p>
      <text:p text:style-name="P8"/>
      <text:p text:style-name="P8"><text:s text:c="8"/>if (proc_filho) {</text:p>
      <text:p text:style-name="P8"><text:s text:c="12"/>proc_filho-&gt;parent_pid = pid_do_pai;</text:p>
      <text:p text:style-name="P8"><text:s text:c="12"/></text:p>
      <text:p text:style-name="P8"><text:s text:c="12"/>// Se o pai detinha o foco ativo (Ex: Terminal CLI), o controle é transferido nativamente</text:p>
      <text:p text:style-name="P8"><text:s text:c="12"/>if (proc_pai &amp;&amp; proc_pai-&gt;is_foreground == 1) {</text:p>
      <text:p text:style-name="P8"><text:s text:c="16"/>proc_filho-&gt;is_foreground = 1;</text:p>
      <text:p text:style-name="P8"><text:s text:c="16"/>proc_pai-&gt;is_foreground = 0;</text:p>
      <text:p text:style-name="P8"><text:s text:c="16"/>foreground_process = proc_filho;</text:p>
      <text:p text:style-name="P8"><text:s text:c="16"/></text:p>
      <text:p text:style-name="P8"><text:s text:c="16"/>// Limpa buffers residuais para evitar cliques falsos no app novo</text:p>
      <text:p text:style-name="P8"><text:s text:c="16"/>while(keyboard_pop_char() != 0); </text:p>
      <text:p text:style-name="P8"><text:s text:c="12"/>}</text:p>
      <text:p text:style-name="P8"><text:s text:c="8"/>}</text:p>
      <text:p text:style-name="P8"><text:s text:c="4"/>}</text:p>
      <text:p text:style-name="P8">}</text:p>
      <text:p text:style-name="P8"/>
      <text:h text:style-name="P9" text:outline-level="2"><text:soft-page-break/>🛠️ 7. Compilação, Execução e Requisitos</text:h>
      <text:h text:style-name="Heading_20_3" text:outline-level="3">Requisitos de Ferramental:</text:h>
      <text:list text:style-name="L2">
        <text:list-item>
          <text:p text:style-name="P12"><text:span text:style-name="T2">Compilador:</text:span> GCC Cross-Compiler configurado para a arquitetura alvo (<text:span text:style-name="Source_20_Text">x86_64-elf-gcc</text:span>).</text:p>
        </text:list-item>
        <text:list-item>
          <text:p text:style-name="P12"><text:span text:style-name="T2">Montador:</text:span> <text:span text:style-name="Source_20_Text">nasm</text:span> (Netwide Assembler).</text:p>
        </text:list-item>
        <text:list-item>
          <text:p text:style-name="P12"><text:span text:style-name="T2">Linker:</text:span> <text:span text:style-name="Source_20_Text">x86_64-elf-ld</text:span>.</text:p>
        </text:list-item>
        <text:list-item>
          <text:p text:style-name="P12"><text:span text:style-name="T2">Emuladores:</text:span> <text:span text:style-name="Source_20_Text">QEMU</text:span> (com suporte a VBE framebuffer e AHCI ativados) ou <text:span text:style-name="Source_20_Text">Oracle VirtualBox</text:span>.</text:p>
        </text:list-item>
      </text:list>
      <text:h text:style-name="Heading_20_3" text:outline-level="3">Script de Compilação de Exemplo (Makefile Concept):</text:h>
      <text:p text:style-name="Text_20_body">Para compilar e gerar a estrutura binária unificada do Kernel (Ring 0):</text:p>
      <text:p text:style-name="P8"># 1. Limpa resíduos antigos</text:p>
      <text:p text:style-name="P8">rm -f *.o drivers/*.o drivers/hw/*.o drivers/pd/*.o drivers/shell/*.o fs/*.o mem/*.o include/*.o</text:p>
      <text:p text:style-name="P8"/>
      <text:p text:style-name="P8"># 2. Compilação do Assembly</text:p>
      <text:p text:style-name="P8">nasm -f bin boot.asm -o boot.bin</text:p>
      <text:p text:style-name="P8">nasm -f elf64 kernel.asm -o kernel_asm.o</text:p>
      <text:p text:style-name="P8">nasm -f elf64 drivers/interrupts.asm -o drivers/interrupts_asm.o</text:p>
      <text:p text:style-name="P8"/>
      <text:p text:style-name="P8"># 3. Compilação do Core e Memória (Todas com as flags de seções ativas)</text:p>
      <text:p text:style-name="P8">gcc -m64 -ffreestanding -fno-stack-protector -fno-pie -ffunction-sections -fdata-sections -I. -c util/string.c -o util/string.o</text:p>
      <text:p text:style-name="P8">gcc -m64 -ffreestanding -fno-stack-protector -fno-pie -ffunction-sections -fdata-sections -I. -c mem/pmm.c -o mem/pmm.o</text:p>
      <text:p text:style-name="P8">gcc -m64 -ffreestanding -fno-stack-protector -fno-pie -ffunction-sections -fdata-sections -I. -c mem/e820.c -o mem/e820.o</text:p>
      <text:p text:style-name="P8">gcc -m64 -ffreestanding -fno-stack-protector -fno-pie -ffunction-sections -fdata-sections -I. -c drivers/video.c -o drivers/video.o</text:p>
      <text:p text:style-name="P8">gcc -m64 -ffreestanding -fno-stack-protector -fno-pie -ffunction-sections -fdata-sections -I. -c drivers/keyboard.c -o drivers/keyboard.o</text:p>
      <text:p text:style-name="P8">gcc -m64 -ffreestanding -fno-stack-protector -fno-pie -ffunction-sections -fdata-sections -I. -c drivers/idt.c -o drivers/idt.o</text:p>
      <text:p text:style-name="P8">gcc -m64 -ffreestanding -fno-stack-protector -fno-pie -ffunction-sections -fdata-sections -I. -c drivers/apps.c -o drivers/apps.o</text:p>
      <text:p text:style-name="P8">gcc -m64 -ffreestanding -fno-stack-protector -fno-pie -ffunction-sections -fdata-sections -I. -c kernel.c -o kernel_c.o</text:p>
      <text:p text:style-name="P8">gcc -m64 -ffreestanding -fno-stack-protector -fno-pie -ffunction-sections -fdata-sections -I. -c mem/vmm.c -o mem/vmm.o</text:p>
      <text:p text:style-name="P8">gcc -m64 -ffreestanding -fno-stack-protector -fno-pie -ffunction-sections -fdata-sections -I. -c mem/kmalloc.c -o mem/kmalloc.o</text:p>
      <text:p text:style-name="P8">gcc -m64 -ffreestanding -fno-stack-protector -fno-pie -ffunction-sections -fdata-sections -I. -c drivers/timer.c -o drivers/timer.o</text:p>
      <text:p text:style-name="P8">gcc -m64 -ffreestanding -fno-stack-protector -fno-pie -ffunction-sections -fdata-sections -I. -c drivers/proc.c -o drivers/proc.o</text:p>
      <text:p text:style-name="P8">gcc -m64 -ffreestanding -fno-stack-protector -fno-pie -ffunction-sections -fdata-sections -I. -c drivers/syscall.c -o drivers/syscall.o</text:p>
      <text:p text:style-name="P8"><text:soft-page-break/>gcc -m64 -ffreestanding -fno-stack-protector -fno-pie -ffunction-sections -fdata-sections -I. -c mem/gdt.c -o mem/gdt.o</text:p>
      <text:p text:style-name="P8">gcc -m64 -ffreestanding -fno-stack-protector -fno-pie -ffunction-sections -fdata-sections -I. -c drivers/vfs.c -o drivers/vfs.o</text:p>
      <text:p text:style-name="P8">gcc -m64 -ffreestanding -fno-stack-protector -fno-pie -ffunction-sections -fdata-sections -I. -c drivers/ide.c -o drivers/ide.o</text:p>
      <text:p text:style-name="P8">gcc -m64 -ffreestanding -fno-stack-protector -fno-pie -ffunction-sections -fdata-sections -I. -c drivers/fonts.c -o drivers/fonts.o</text:p>
      <text:p text:style-name="P8">gcc -m64 -ffreestanding -fno-stack-protector -fno-pie -ffunction-sections -fdata-sections -I. -c drivers/mouse.c -o drivers/mouse.o</text:p>
      <text:p text:style-name="P8">gcc -m64 -ffreestanding -fno-stack-protector -fno-pie -ffunction-sections -fdata-sections -I. -c drivers/desktop.c -o drivers/desktop.o</text:p>
      <text:p text:style-name="P8">gcc -m64 -ffreestanding -fno-stack-protector -fno-pie -ffunction-sections -fdata-sections -I. -c drivers/double_buffering.c -o drivers/double_buffering.o</text:p>
      <text:p text:style-name="P8">gcc -m64 -ffreestanding -fno-stack-protector -fno-pie -ffunction-sections -fdata-sections -I. -c drivers/io.c -o drivers/io.o</text:p>
      <text:p text:style-name="P8"/>
      <text:p text:style-name="P8"># 4. Compilando o Shell</text:p>
      <text:p text:style-name="P8">gcc -m64 -ffreestanding -fno-stack-protector -fno-pie -ffunction-sections -fdata-sections -I. -c drivers/shell/shell.c -o drivers/shell/shell.o</text:p>
      <text:p text:style-name="P8">gcc -m64 -ffreestanding -fno-stack-protector -fno-pie -ffunction-sections -fdata-sections -I. -c drivers/shell/shell_commands.c -o drivers/shell/shell_commands.o</text:p>
      <text:p text:style-name="P8">gcc -m64 -ffreestanding -fno-stack-protector -fno-pie -ffunction-sections -fdata-sections -I. -c drivers/shell/shell_prompt.c -o drivers/shell/shell_prompt.o</text:p>
      <text:p text:style-name="P8"/>
      <text:p text:style-name="P8"># 5. Compilando o Sistema de Arquivos FAT32</text:p>
      <text:p text:style-name="P8">gcc -m64 -ffreestanding -fno-stack-protector -fno-pie -ffunction-sections -fdata-sections -I. -c fs/fat32.c -o fs/fat32.o</text:p>
      <text:p text:style-name="P8">gcc -m64 -ffreestanding -fno-stack-protector -fno-pie -ffunction-sections -fdata-sections -I. -c fs/fat32_logic.c -o fs/fat32_logic.o</text:p>
      <text:p text:style-name="P8">gcc -m64 -ffreestanding -fno-stack-protector -fno-pie -ffunction-sections -fdata-sections -I. -c fs/fat32_dir.c -o fs/fat32_dir.o</text:p>
      <text:p text:style-name="P8">gcc -m64 -ffreestanding -fno-stack-protector -fno-pie -ffunction-sections -fdata-sections -I. -c fs/fat32_file.c -o fs/fat32_file.o</text:p>
      <text:p text:style-name="P8">gcc -m64 -ffreestanding -fno-stack-protector -fno-pie -ffunction-sections -fdata-sections -I. -c fs/fat32_xcopy.c -o fs/fat32_xcopy.o</text:p>
      <text:p text:style-name="P8"/>
      <text:p text:style-name="P8"># 6. Compilando o Sub-sistema ELF e Hardware Base</text:p>
      <text:p text:style-name="P8">gcc -m64 -ffreestanding -fno-stack-protector -fno-pie -ffunction-sections -fdata-sections -I. -c include/elf.c -o include/elf.o</text:p>
      <text:p text:style-name="P8">gcc -m64 -ffreestanding -fno-stack-protector -fno-pie -ffunction-sections -fdata-sections -I. -c drivers/hw/pci.c -o drivers/hw/pci.o</text:p>
      <text:p text:style-name="P8">gcc -m64 -ffreestanding -fno-stack-protector -fno-pie -ffunction-sections -fdata-sections -I. -c drivers/hw/serial.c -o drivers/hw/serial.o</text:p>
      <text:p text:style-name="P8">gcc -m64 -ffreestanding -fno-stack-protector -fno-pie -ffunction-sections -fdata-sections -I. -c drivers/hw/pic.c -o drivers/hw/pic.o</text:p>
      <text:p text:style-name="P8">gcc -m64 -ffreestanding -fno-stack-protector -fno-pie -ffunction-sections -fdata-sections -I. -c drivers/hw/disk.c -o drivers/hw/disk.o</text:p>
      <text:p text:style-name="P8">gcc -m64 -ffreestanding -fno-stack-protector -fno-pie -ffunction-sections -fdata-sections -I. -c drivers/hw/ps2.c -o drivers/hw/ps2.o</text:p>
      <text:p text:style-name="P8"/>
      <text:p text:style-name="P8"># 7. Compilando Controladora AHCI / SATA</text:p>
      <text:p text:style-name="P8"><text:soft-page-break/>gcc -m64 -ffreestanding -fno-stack-protector -fno-pie -ffunction-sections -fdata-sections -I. -c drivers/hw/ahci_pci.c -o drivers/hw/ahci_pci.o</text:p>
      <text:p text:style-name="P8">gcc -m64 -ffreestanding -fno-stack-protector -fno-pie -ffunction-sections -fdata-sections -I. -c drivers/hw/ahci_vmm.c -o drivers/hw/ahci_vmm.o</text:p>
      <text:p text:style-name="P8">gcc -m64 -ffreestanding -fno-stack-protector -fno-pie -ffunction-sections -fdata-sections -I. -c drivers/hw/ahci_reset.c -o drivers/hw/ahci_reset.o</text:p>
      <text:p text:style-name="P8">gcc -m64 -ffreestanding -fno-stack-protector -fno-pie -ffunction-sections -fdata-sections -I. -c drivers/hw/ahci_mem.c -o drivers/hw/ahci_mem.o</text:p>
      <text:p text:style-name="P8">gcc -m64 -ffreestanding -fno-stack-protector -fno-pie -ffunction-sections -fdata-sections -I. -c drivers/hw/ahci_cmd.c -o drivers/hw/ahci_cmd.o</text:p>
      <text:p text:style-name="P8">gcc -m64 -ffreestanding -fno-stack-protector -fno-pie -ffunction-sections -fdata-sections -I. -c drivers/hw/ahci_hal.c -o drivers/hw/ahci_hal.o</text:p>
      <text:p text:style-name="P8"/>
      <text:p text:style-name="P8"># 8. Compilando USB II Stack (Apenas uma compilação por arquivo, com as devidas flags)</text:p>
      <text:p text:style-name="P8"/>
      <text:p text:style-name="P8">gcc -m64 -ffreestanding -fno-stack-protector -fno-pie -ffunction-sections -fdata-sections -I. -c drivers/pd/xhci_pci.c -o drivers/pd/xhci_pci.o</text:p>
      <text:p text:style-name="P8">gcc -m64 -ffreestanding -fno-stack-protector -fno-pie -ffunction-sections -fdata-sections -I. -c drivers/pd/xhci_ports.c -o drivers/pd/xhci_ports.o</text:p>
      <text:p text:style-name="P8">gcc -m64 -ffreestanding -fno-stack-protector -fno-pie -ffunction-sections -fdata-sections -I. -c drivers/pd/xhci_cmd.c -o drivers/pd/xhci_cmd.o</text:p>
      <text:p text:style-name="P8">gcc -m64 -ffreestanding -fno-stack-protector -fno-pie -ffunction-sections -fdata-sections -I. -c drivers/pd/xhci_dev.c -o drivers/pd/xhci_dev.o</text:p>
      <text:p text:style-name="P8">gcc -m64 -ffreestanding -fno-stack-protector -fno-pie -ffunction-sections -fdata-sections -I. -c drivers/pd/xhci_desc.c -o drivers/pd/xhci_desc.o</text:p>
      <text:p text:style-name="P8">gcc -m64 -ffreestanding -fno-stack-protector -fno-pie -ffunction-sections -fdata-sections -I. -c drivers/pd/xhci_sub.c -o drivers/pd/xhci_sub.o</text:p>
      <text:p text:style-name="P8">gcc -m64 -ffreestanding -fno-stack-protector -fno-pie -ffunction-sections -fdata-sections -I. -c drivers/pd/xhci_config.c -o drivers/pd/xhci_config.o</text:p>
      <text:p text:style-name="P8">gcc -m64 -ffreestanding -fno-stack-protector -fno-pie -ffunction-sections -fdata-sections -I. -c drivers/pd/xhci_rw.c -o drivers/pd/xhci_rw.o</text:p>
      <text:p text:style-name="P8"/>
      <text:p text:style-name="P8"># 8. Compilando USB II Stack (Apenas uma compilação por arquivo, com as devidas flags)</text:p>
      <text:p text:style-name="P8"/>
      <text:p text:style-name="P8">gcc -m64 -ffreestanding -fno-stack-protector -fno-pie -ffunction-sections -fdata-sections -I. -c drivers/pd/ehci_pci.c -o drivers/pd/ehci_pci.o</text:p>
      <text:p text:style-name="P8">gcc -m64 -ffreestanding -fno-stack-protector -fno-pie -ffunction-sections -fdata-sections -I. -c drivers/pd/ehci_core.c -o drivers/pd/ehci_core.o</text:p>
      <text:p text:style-name="P8">gcc -m64 -ffreestanding -fno-stack-protector -fno-pie -ffunction-sections -fdata-sections -I. -c drivers/pd/ehci_storage.c -o drivers/pd/ehci_storage.o</text:p>
      <text:p text:style-name="P8"/>
      <text:p text:style-name="P8">gcc -m64 -ffreestanding -fno-stack-protector -fno-pie -ffunction-sections -fdata-sections -I. -c drivers/pd/storage.c -o drivers/pd/storage.o</text:p>
      <text:p text:style-name="P8"/>
      <text:p text:style-name="P8"/>
      <text:p text:style-name="P8"># 9. Linkagem Final com Remoção de Seções Mortas Ativada (--gc-sections)</text:p>
      <text:p text:style-name="P8">ld -m elf_x86_64 -T linker.ld --gc-sections -o kernel.bin \</text:p>
      <text:p text:style-name="P8"><text:s text:c="3"/>kernel_asm.o \</text:p>
      <text:p text:style-name="P8"><text:s text:c="3"/>kernel_c.o \</text:p>
      <text:p text:style-name="P8"><text:s text:c="3"/>drivers/idt.o \</text:p>
      <text:p text:style-name="P8"><text:s text:c="3"/>drivers/video.o \</text:p>
      <text:p text:style-name="P8"><text:s text:c="3"/>drivers/keyboard.o \</text:p>
      <text:p text:style-name="P8"><text:soft-page-break/><text:s text:c="3"/>drivers/interrupts_asm.o \</text:p>
      <text:p text:style-name="P8"><text:s text:c="3"/>drivers/timer.o \</text:p>
      <text:p text:style-name="P8"><text:s text:c="3"/>drivers/proc.o \</text:p>
      <text:p text:style-name="P8"><text:s text:c="3"/>drivers/syscall.o \</text:p>
      <text:p text:style-name="P8"><text:s text:c="3"/>drivers/fonts.o \</text:p>
      <text:p text:style-name="P8"><text:s text:c="3"/>drivers/apps.o \</text:p>
      <text:p text:style-name="P8"><text:s text:c="3"/>drivers/vfs.o \</text:p>
      <text:p text:style-name="P8"><text:s text:c="3"/>drivers/io.o \</text:p>
      <text:p text:style-name="P8"><text:s text:c="3"/>drivers/mouse.o \</text:p>
      <text:p text:style-name="P8"><text:s text:c="3"/>mem/pmm.o \</text:p>
      <text:p text:style-name="P8"><text:s text:c="3"/>mem/e820.o \</text:p>
      <text:p text:style-name="P8"><text:s text:c="3"/>mem/vmm.o \</text:p>
      <text:p text:style-name="P8"><text:s text:c="3"/>mem/kmalloc.o \</text:p>
      <text:p text:style-name="P8"><text:s text:c="3"/>mem/gdt.o \</text:p>
      <text:p text:style-name="P8"><text:s text:c="3"/>util/string.o \</text:p>
      <text:p text:style-name="P8"><text:s text:c="3"/>fs/fat32.o \</text:p>
      <text:p text:style-name="P8"><text:s text:c="3"/>fs/fat32_logic.o \</text:p>
      <text:p text:style-name="P8"><text:s text:c="3"/>fs/fat32_file.o \</text:p>
      <text:p text:style-name="P8"><text:s text:c="3"/>fs/fat32_dir.o \</text:p>
      <text:p text:style-name="P8"><text:s text:c="3"/>fs/fat32_xcopy.o \</text:p>
      <text:p text:style-name="P8"><text:s text:c="3"/>include/elf.o \</text:p>
      <text:p text:style-name="P8"><text:s text:c="3"/>drivers/shell/shell.o \</text:p>
      <text:p text:style-name="P8"><text:s text:c="3"/>drivers/shell/shell_commands.o \</text:p>
      <text:p text:style-name="P8"><text:s text:c="3"/>drivers/shell/shell_prompt.o \</text:p>
      <text:p text:style-name="P8"><text:s text:c="3"/>drivers/double_buffering.o \</text:p>
      <text:p text:style-name="P8"><text:s text:c="3"/>drivers/desktop.o \</text:p>
      <text:p text:style-name="P8"><text:s text:c="3"/>drivers/hw/serial.o \</text:p>
      <text:p text:style-name="P8"><text:s text:c="3"/>drivers/hw/disk.o \</text:p>
      <text:p text:style-name="P8"><text:s text:c="3"/>drivers/hw/pic.o \</text:p>
      <text:p text:style-name="P8"><text:s text:c="3"/>drivers/hw/pci.o \</text:p>
      <text:p text:style-name="P8"><text:s text:c="3"/>drivers/hw/ahci_pci.o \</text:p>
      <text:p text:style-name="P8"><text:s text:c="3"/>drivers/hw/ahci_vmm.o \</text:p>
      <text:p text:style-name="P8"><text:s text:c="3"/>drivers/hw/ahci_reset.o \</text:p>
      <text:p text:style-name="P8"><text:s text:c="3"/>drivers/hw/ahci_mem.o \</text:p>
      <text:p text:style-name="P8"><text:s text:c="3"/>drivers/hw/ahci_cmd.o \</text:p>
      <text:p text:style-name="P8"><text:s text:c="3"/>drivers/hw/ahci_hal.o \</text:p>
      <text:p text:style-name="P8"><text:s text:c="3"/>drivers/hw/ps2.o \</text:p>
      <text:p text:style-name="P8"><text:s text:c="3"/>drivers/pd/ehci_pci.o \</text:p>
      <text:p text:style-name="P8"><text:s text:c="3"/>drivers/pd/ehci_core.o \</text:p>
      <text:p text:style-name="P8"><text:s text:c="3"/>drivers/pd/storage.o \</text:p>
      <text:p text:style-name="P8"><text:s text:c="3"/>drivers/pd/ehci_storage.o \</text:p>
      <text:p text:style-name="P8"><text:s text:c="3"/>--oformat binary</text:p>
      <text:p text:style-name="P8"><text:s text:c="3"/></text:p>
      <text:p text:style-name="P8"># 1. Montagem da Imagem de Disco Virtual</text:p>
      <text:p text:style-name="P8"/>
      <text:p text:style-name="P8">rm -f disco_total.img</text:p>
      <text:p text:style-name="P8">dd if=/dev/zero of=disco_total.img bs=1M count=100</text:p>
      <text:p text:style-name="P8">dd if=boot.bin of=disco_total.img bs=512 count=1 conv=notrunc</text:p>
      <text:p text:style-name="P8">dd if=kernel.bin of=disco_total.img bs=512 seek=1 conv=notrunc</text:p>
      <text:p text:style-name="P8"/>
      <text:p text:style-name="P8">dd if=disco_sata.img of=disco_total.img seek=2048 conv=notrunc</text:p>
      <text:p text:style-name="P8"/>
      <text:p text:style-name="P8"><text:soft-page-break/>Para compilar e linkar o Compositor Gráfico Central (<text:span text:style-name="Source_20_Text">Explorer.elf</text:span>):</text:p>
      <text:p text:style-name="P8"/>
      <text:p text:style-name="P8">gcc -m64 -ffreestanding -fno-stack-protector -fno-pie -c explorer.c -o explorer.o</text:p>
      <text:p text:style-name="P8"/>
      <text:p text:style-name="P8">ld -m elf_x86_64 -T user.ld -static -no-pie \</text:p>
      <text:p text:style-name="P8"><text:s text:c="4"/>../system/crt0.o \</text:p>
      <text:p text:style-name="P8"><text:s text:c="4"/>../system/string.o \</text:p>
      <text:p text:style-name="P8"><text:s text:c="4"/>../system/malloc.o \</text:p>
      <text:p text:style-name="P8"><text:s text:c="4"/>../system/fonts.o \</text:p>
      <text:p text:style-name="P8"><text:s text:c="4"/>../system/graphics.o \</text:p>
      <text:p text:style-name="P8"><text:s text:c="4"/>../events/input_events.o \</text:p>
      <text:p text:style-name="P8"><text:s text:c="4"/>../events/cursor_engine.o \</text:p>
      <text:p text:style-name="P8"><text:s text:c="4"/>../gui/gui.o \</text:p>
      <text:p text:style-name="P8"><text:s text:c="4"/>../gui/wm.o \</text:p>
      <text:p text:style-name="P8"><text:s text:c="4"/>../gui/z_order.o \</text:p>
      <text:p text:style-name="P8"><text:s text:c="4"/>../gui/gui_interaction.o \</text:p>
      <text:p text:style-name="P8"><text:s text:c="4"/>explorer.o \</text:p>
      <text:p text:style-name="P8"><text:s text:c="4"/>-o explorer.elf</text:p>
      <text:p text:style-name="P8"><text:s text:c="4"/></text:p>
      <text:p text:style-name="P8"/>
      <text:p text:style-name="P8">Para compilar e empacotar uma aplicação cliente utilizando o Runtime RAD:</text:p>
      <text:p text:style-name="P8"/>
      <text:p text:style-name="P8"># 1. Sistema e Runtime (A base do executável)</text:p>
      <text:p text:style-name="P8"/>
      <text:p text:style-name="P8">gcc -m64 -ffreestanding -fno-stack-protector -fno-pie -c system/crt0.c -o system/crt0.o</text:p>
      <text:p text:style-name="P8">gcc -m64 -ffreestanding -fno-stack-protector -fno-pie -I. -c system/string.c -o system/string.o</text:p>
      <text:p text:style-name="P8">gcc -m64 -ffreestanding -fno-stack-protector -fno-pie -I. -c system/malloc.c -o system/malloc.o</text:p>
      <text:p text:style-name="P8"/>
      <text:p text:style-name="P8"># 2. Biblioteca Visual e RAD (Note que adicionei -fno-pie aqui também)</text:p>
      <text:p text:style-name="P8"/>
      <text:p text:style-name="P8">gcc -m64 -ffreestanding -fno-stack-protector -fno-pie -Isystem -I. -c Runtime/controls.c -o Runtime/controls.o</text:p>
      <text:p text:style-name="P8"/>
      <text:p text:style-name="P8">gcc -m64 -ffreestanding -fno-stack-protector -fno-pie -Isystem -I. -c Runtime/test.c -o Runtime/test.o</text:p>
      <text:p text:style-name="P8"/>
      <text:p text:style-name="P8">COMPONENTES </text:p>
      <text:p text:style-name="P8"/>
      <text:p text:style-name="P8">gcc -m64 -ffreestanding -fno-stack-protector -fno-pie -Isystem -I. -c Runtime/components/os_label.c -o Runtime/components/os_label.o</text:p>
      <text:p text:style-name="P8"/>
      <text:p text:style-name="P8">gcc -m64 -ffreestanding -fno-stack-protector -fno-pie -Isystem -I. -c Runtime/components/os_button.c -o Runtime/components/os_button.o</text:p>
      <text:p text:style-name="P8"/>
      <text:p text:style-name="P8">gcc -m64 -ffreestanding -fno-stack-protector -fno-pie -Isystem -I. -c Runtime/components/os_edit.c -o Runtime/components/os_edit.o</text:p>
      <text:p text:style-name="P8"/>
      <text:p text:style-name="P8">gcc -m64 -ffreestanding -fno-stack-protector -fno-pie -Isystem -I. -c Runtime/components/os_memo.c -o Runtime/components/os_memo.o</text:p>
      <text:p text:style-name="P8"/>
      <text:p text:style-name="P8">gcc -m64 -ffreestanding -fno-stack-protector -fno-pie -Isystem -I. -c Runtime/components/os_combobox.c -o Runtime/components/os_combobox.o</text:p>
      <text:p text:style-name="P8"><text:soft-page-break/>gcc -m64 -ffreestanding -fno-stack-protector -fno-pie -Isystem -I. -c Runtime/components/os_image.c -o Runtime/components/os_image.o</text:p>
      <text:p text:style-name="P8"/>
      <text:p text:style-name="P8">gcc -m64 -ffreestanding -fno-stack-protector -fno-pie -Isystem -I. -c Runtime/components/os_radiobutton.c -o Runtime/components/os_radiobutton.o</text:p>
      <text:p text:style-name="P8"/>
      <text:p text:style-name="P8">gcc -m64 -ffreestanding -fno-stack-protector -fno-pie -Isystem -I. -c Runtime/components/os_checkbox.c -o Runtime/components/os_checkbox.o</text:p>
      <text:p text:style-name="P8"/>
      <text:p text:style-name="P8">gcc -m64 -ffreestanding -fno-stack-protector -fno-pie -Isystem -I. -c Runtime/components/os_image.c -o Runtime/components/os_image.o</text:p>
      <text:p text:style-name="P8"/>
      <text:p text:style-name="P8">gcc -m64 -ffreestanding -fno-stack-protector -fno-pie -Isystem -I. -c Runtime/components/os_panel.c -o Runtime/components/os_panel.o</text:p>
      <text:p text:style-name="P8"/>
      <text:p text:style-name="P8">gcc -m64 -ffreestanding -fno-stack-protector -fno-pie -Isystem -I. -c Runtime/components/os_form.c -o Runtime/components/os_form.o</text:p>
      <text:p text:style-name="P8"/>
      <text:p text:style-name="P8">SERIAL E IPC</text:p>
      <text:p text:style-name="P8"/>
      <text:p text:style-name="P8">gcc -m64 -ffreestanding -fno-stack-protector -fno-pie -Isystem -I. -c Runtime/components/TOSSerial.c -o Runtime/components/TOSSerial.o</text:p>
      <text:p text:style-name="P8"/>
      <text:p text:style-name="P8">gcc -m64 -ffreestanding -fno-stack-protector -fno-pie -Isystem -I. -c Runtime/components/TOS_IPC.c -o Runtime/components/TOS_IPC.o</text:p>
      <text:p text:style-name="P8"/>
      <text:p text:style-name="P8"># Usamos o LD (Linker) diretamente para ter controle total</text:p>
      <text:p text:style-name="P8">ld -m elf_x86_64 -T user.ld -static -o test.elf \</text:p>
      <text:p text:style-name="P8"><text:s text:c="4"/>system/crt0.o \</text:p>
      <text:p text:style-name="P8"><text:s text:c="4"/>Runtime/test.o \</text:p>
      <text:p text:style-name="P8"><text:s text:c="4"/>Runtime/controls.o \</text:p>
      <text:p text:style-name="P8"><text:s text:c="4"/>Runtime/components/os_form.o \</text:p>
      <text:p text:style-name="P8"><text:s text:c="4"/>Runtime/components/os_button.o \</text:p>
      <text:p text:style-name="P8"><text:s text:c="4"/>Runtime/components/os_edit.o \</text:p>
      <text:p text:style-name="P8"><text:s text:c="4"/>Runtime/components/os_image.o \</text:p>
      <text:p text:style-name="P8"><text:s text:c="4"/>Runtime/components/os_label.o \</text:p>
      <text:p text:style-name="P8"><text:s text:c="4"/>Runtime/components/os_checkbox.o \</text:p>
      <text:p text:style-name="P8"><text:s text:c="4"/>Runtime/components/os_panel.o \</text:p>
      <text:p text:style-name="P8"><text:s text:c="4"/>Runtime/components/os_memo.o \</text:p>
      <text:p text:style-name="P8"><text:s text:c="4"/>Runtime/components/os_combobox.o \</text:p>
      <text:p text:style-name="P8"><text:s text:c="4"/>Runtime/components/os_radiobutton.o \</text:p>
      <text:p text:style-name="P8"><text:s text:c="4"/>gui/gui.o \</text:p>
      <text:p text:style-name="P8"><text:s text:c="4"/>gui/wm.o \</text:p>
      <text:p text:style-name="P8"><text:s text:c="4"/>gui/z_order.o \</text:p>
      <text:p text:style-name="P8"><text:s text:c="4"/>gui/gui_interaction.o \</text:p>
      <text:p text:style-name="P8"><text:s text:c="4"/>system/graphics.o \</text:p>
      <text:p text:style-name="P8"><text:s text:c="4"/>system/fonts.o \</text:p>
      <text:p text:style-name="P8"><text:s text:c="4"/>system/string.o \</text:p>
      <text:p text:style-name="P8"><text:s text:c="4"/>events/input_events.o \</text:p>
      <text:p text:style-name="P8"><text:s text:c="4"/>Runtime/components/TOS_IPC.o \</text:p>
      <text:p text:style-name="P8"><text:s text:c="4"/>Runtime/components/TOSSerial.o \</text:p>
      <text:p text:style-name="P8"><text:s text:c="4"/>system/malloc.o</text:p>
      <text:h text:style-name="P9" text:outline-level="2"><text:soft-page-break/>📜 8. Base Legal e Licença (<text:span text:style-name="Source_20_Text">07_LICENSE</text:span>)</text:h>
      <text:p text:style-name="Text_20_body">O <text:span text:style-name="T2">LBF OS</text:span> é distribuído sob os termos da licença <text:span text:style-name="T2">GNU General Public License v3.0 (GPLv3)</text:span>.</text:p>
      <text:p text:style-name="Text_20_body"/>
      <text:p text:style-name="Text_20_body"/>
      <text:p text:style-name="P13">NÃO USAR O TEXTO ABAIXO E SO EXPLICAÇÃO</text:p>
      <text:h text:style-name="Heading_20_3" text:outline-level="3">O que isso garante para a comunidade?</text:h>
      <text:list text:style-name="L3">
        <text:list-item>
          <text:p text:style-name="P14"><text:span text:style-name="T2">Liberdade de Uso:</text:span> Qualquer pessoa pode baixar, executar e implantar o sistema operacional em hardware real para qualquer finalidade (educacional, pessoal ou comercial).</text:p>
        </text:list-item>
        <text:list-item>
          <text:p text:style-name="P14"><text:span text:style-name="T2">Liberdade de Modificação:</text:span> É permitido alterar os drivers, customizar o compositor gráfico, portar novas linguagens e modificar as chamadas de sistema do kernel.</text:p>
        </text:list-item>
        <text:list-item>
          <text:p text:style-name="P14"><text:span text:style-name="T2">A Regra de Ouro do Copyleft (Código Aberto Obrigatório):</text:span> Se qualquer indivíduo ou empresa modificar o código-fonte do LBF OS e decidir distribuir ou comercializar a nova versão resultante, <text:span text:style-name="T2">eles são legalmente obrigados a disponibilizar publicamente os fontes completos modificados sob esta mesmíssima licença GPLv3</text:span>. Isso evita que o seu trabalho de desenvolvimento de baixo nível seja fechado e transformado em um produto proprietário por terceiros. """</text:p>
        </text:list-item>
      </text:list>
      <text:p text:style-name="Text_20_body">with open("README.md", "w", encoding="utf-8") as f: f.write(content)</text:p>
      <text:p text:style-name="Text_20_body">print("FILE_CREATED")</text:p>
      <text:p text:style-name="P15"/>
      <text:p text:style-name="P16"/>
      <text:p text:style-name="P8">O nome **LBF OS (Lightweight Binary Framework Operating System)** é absolutamente perfeito! Ele traduz de forma técnica e exata o que o sistema é: um núcleo "lightweight" (leve/enxuto) que não carrega o peso excessivo do POSIX, mas que fornece um "framework binário" estruturado e rigoroso em Ring 3 para que as aplicações e a interface gráfica (RAD/Delphi-like) funcionem de forma harmônica e isolada. Soa profissional e descreve muito bem a arquitetura moderna baseada em compositor e IPC que você idealizou. Eu estruturei o arquivo `README.md` transformando todo o seu rascunho em uma documentação profissional. Ele inclui explicações técnicas da arquitetura, o pipeline do ciclo gráfico, a separação rigorosa de Ring 0 / Ring 3, os detalhes exatos da unificação do sistema de processos na `task_d` que acabamos de fazer, os códigos de linha de comando para linkagem baseados nos seus caminhos de pastas, além da descrição final sobre a filosofia do projeto sob a licença **GPLv3**. Your Markdown file is ready [file-tag: code-generated-file-0-1781979470396104376] Esse documento vai servir como uma excelente vitrine para o GitHub, ajudando estudantes de Sistemas Operacionais, entusiastas e engenheiros de baixo nível a entenderem de cara a grandiosidade e a mecânica do seu projeto. Ficou excelente! Se quiser adicionar mais algum detalhe ou instrução antes de subir, é só falar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Google Sans Text" svg:font-family="'Google Sans Text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I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" style:font-family-complex="'Noto Sans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" style:font-family-complex="'Noto Sans Devanagari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3-04-27T19:59:21.138999389</meta:creation-date>
    <meta:generator>LibreOffice/25.8.4.2$Linux_X86_64 LibreOffice_project/580$Build-2</meta:generator>
    <dc:date>2026-06-20T15:43:13.172167894</dc:date>
    <meta:editing-duration>PT23M4S</meta:editing-duration>
    <meta:editing-cycles>26</meta:editing-cycles>
    <meta:document-statistic meta:table-count="1" meta:image-count="2" meta:object-count="0" meta:page-count="13" meta:paragraph-count="344" meta:word-count="3084" meta:character-count="25315" meta:non-whitespace-character-count="21834"/>
  </office:meta>
</office:document-meta>
</file>