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lorer</text:h>
      <text:h text:style-name="Heading_20_2" text:outline-level="2">Descrição</text:h>
      <text:p text:style-name="Text_20_body">O Explorer.elf é o principal componente do ambiente gráfico do sistema operacional.</text:p>
      <text:p text:style-name="Text_20_body">Ele executa em Ring3 e atua como:</text:p>
      <text:list text:style-name="L1">
        <text:list-item>
          <text:p text:style-name="P1">Compositor gráfico</text:p>
        </text:list-item>
        <text:list-item>
          <text:p text:style-name="P1">Gerenciador de janelas</text:p>
        </text:list-item>
        <text:list-item>
          <text:p text:style-name="P1">Servidor de eventos</text:p>
        </text:list-item>
        <text:list-item>
          <text:p text:style-name="P1">Coordenador de IPC</text:p>
        </text:list-item>
        <text:list-item>
          <text:p text:style-name="P1">Gerenciador de foco e profundidade</text:p>
        </text:list-item>
        <text:list-item>
          <text:p text:style-name="P1">Controlador de entrada do usuário</text:p>
        </text:list-item>
      </text:list>
      <text:h text:style-name="Heading_20_2" text:outline-level="2">Responsabilidades</text:h>
      <text:h text:style-name="Heading_20_3" text:outline-level="3">Entrada</text:h>
      <text:p text:style-name="Text_20_body">Recebe eventos de:</text:p>
      <text:list text:style-name="L2">
        <text:list-item>
          <text:p text:style-name="P2">Mouse</text:p>
        </text:list-item>
        <text:list-item>
          <text:p text:style-name="P2">Teclado</text:p>
        </text:list-item>
        <text:list-item>
          <text:p text:style-name="P2">Temporizadores</text:p>
        </text:list-item>
      </text:list>
      <text:p text:style-name="Text_20_body">através das interfaces disponibilizadas pelo kernel.</text:p>
      <text:h text:style-name="Heading_20_3" text:outline-level="3">Gerenciamento de Janelas</text:h>
      <text:p text:style-name="Text_20_body">Controla:</text:p>
      <text:list text:style-name="L3">
        <text:list-item>
          <text:p text:style-name="P3">Criação de janelas</text:p>
        </text:list-item>
        <text:list-item>
          <text:p text:style-name="P3">Fechamento de janelas</text:p>
        </text:list-item>
        <text:list-item>
          <text:p text:style-name="P3">Movimentação</text:p>
        </text:list-item>
        <text:list-item>
          <text:p text:style-name="P3">Redimensionamento</text:p>
        </text:list-item>
        <text:list-item>
          <text:p text:style-name="P3">Visibilidade</text:p>
        </text:list-item>
        <text:list-item>
          <text:p text:style-name="P3">Foco</text:p>
        </text:list-item>
      </text:list>
      <text:h text:style-name="Heading_20_3" text:outline-level="3">Profundidade</text:h>
      <text:p text:style-name="Text_20_body">Mantém a ordem das janelas na área de trabalho.</text:p>
      <text:p text:style-name="Text_20_body">Determina:</text:p>
      <text:list text:style-name="L4">
        <text:list-item>
          <text:p text:style-name="P4">Qual janela está ativa</text:p>
        </text:list-item>
        <text:list-item>
          <text:p text:style-name="P4"><text:soft-page-break/>Qual janela está sobreposta</text:p>
        </text:list-item>
        <text:list-item>
          <text:p text:style-name="P4">Qual janela recebe os eventos do usuário</text:p>
        </text:list-item>
      </text:list>
      <text:h text:style-name="Heading_20_3" text:outline-level="3">IPC</text:h>
      <text:p text:style-name="Text_20_body">Coordena a comunicação entre aplicações e o ambiente gráfico.</text:p>
      <text:p text:style-name="Text_20_body">Distribui eventos e mensagens para os processos corretos.</text:p>
      <text:h text:style-name="Heading_20_3" text:outline-level="3">Composição Gráfica</text:h>
      <text:p text:style-name="Text_20_body">Cada aplicação desenha em seu próprio RamBuffer.</text:p>
      <text:p text:style-name="Text_20_body">O Explorer.elf coleta os buffers visíveis, realiza a composição da cena completa e gera um BackBuffer global.</text:p>
      <text:p text:style-name="Text_20_body">Após a composição, o BackBuffer é transferido para a VRAM utilizando o mecanismo de double buffering através da syscall video_flip(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19T20:57:38.352441235</dc:date>
    <meta:editing-duration>PT9S</meta:editing-duration>
    <meta:editing-cycles>1</meta:editing-cycles>
    <meta:document-statistic meta:table-count="0" meta:image-count="0" meta:object-count="0" meta:page-count="2" meta:paragraph-count="38" meta:word-count="178" meta:character-count="1119" meta:non-whitespace-character-count="997"/>
  </office:meta>
</office:document-meta>
</file>