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01_README</text:h>
      <text:p text:style-name="Text_20_body">➡️ Visão geral do sistema inteiro<text:line-break/>✔ Arquitetura<text:line-break/>✔ filosofia<text:line-break/>✔ stack completa</text:p>
      <text:p text:style-name="Horizontal_20_Line"/>
      <text:h text:style-name="Heading_20_2" text:outline-level="2">🌳 02_tree</text:h>
      <text:p text:style-name="Text_20_body">➡️ Estrutura física do projeto<text:line-break/>✔ organização de pastas<text:line-break/>✔ separação Kernel / Userland / Runtime<text:line-break/>✔ base de compilação</text:p>
      <text:p text:style-name="Horizontal_20_Line"/>
      <text:h text:style-name="Heading_20_2" text:outline-level="2">🏗️ 03_architecture</text:h>
      <text:p text:style-name="Text_20_body">➡️ Arquitetura profunda do sistema<text:line-break/>✔ Ring0 / Ring3<text:line-break/>✔ Explorer como compositor obrigatório<text:line-break/>✔ liblib.h como SDK do sistema<text:line-break/>✔ runtime GUI e IA</text:p>
      <text:p text:style-name="Horizontal_20_Line"/>
      <text:h text:style-name="Heading_20_2" text:outline-level="2">🚀 04_boot_process</text:h>
      <text:p text:style-name="Text_20_body">➡️ Sequência real de execução<text:line-break/>✔ boot.asm → kernel.asm → long mode → kernel.c<text:line-break/>✔ inicialização do hardware<text:line-break/>✔ entrada no kernel</text:p>
      <text:p text:style-name="Horizontal_20_Line"/>
      <text:h text:style-name="Heading_20_2" text:outline-level="2">📦 05_container</text:h>
      <text:p text:style-name="Text_20_body">➡️ Modelo de execução dos processos<text:line-break/>✔ cada .elf dentro de container<text:line-break/>✔ isolamento lógico no Explorer<text:line-break/>✔ buffers por aplicação</text:p>
      <text:p text:style-name="Horizontal_20_Line"/>
      <text:h text:style-name="Heading_20_2" text:outline-level="2">🖥️ 06_explorer</text:h>
      <text:p text:style-name="Text_20_body">➡️ O coração do Userland gráfico<text:line-break/>✔ compositor<text:line-break/><text:soft-page-break/>✔ window manager<text:line-break/>✔ IPC<text:line-break/>✔ merge de buffers<text:line-break/>✔ VRAM flip<text:line-break/>✔ z-order e eventos</text:p>
      <text:p text:style-name="Horizontal_20_Line"/>
      <text:h text:style-name="Heading_20_2" text:outline-level="2">📜 07_LICENSE</text:h>
      <text:p text:style-name="Text_20_body">➡️ Base legal do projeto<text:line-break/>✔ GPLv3<text:line-break/>✔ liberdade de uso/modificação<text:line-break/>✔ distribuição abert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2:53:43.681190839</dc:date>
    <meta:editing-duration>PT10S</meta:editing-duration>
    <meta:editing-cycles>1</meta:editing-cycles>
    <meta:document-statistic meta:table-count="0" meta:image-count="0" meta:object-count="0" meta:page-count="2" meta:paragraph-count="14" meta:word-count="153" meta:character-count="867" meta:non-whitespace-character-count="728"/>
  </office:meta>
</office:document-meta>
</file>