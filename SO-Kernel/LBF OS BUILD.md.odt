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>
      <style:text-properties fo:font-weight="bold"/>
    </style:style>
    <style:style style:name="P4" style:family="paragraph" style:parent-style-name="Text_20_body" style:list-style-name="L1"/>
    <style:style style:name="P5" style:family="paragraph" style:parent-style-name="Standard">
      <style:text-properties officeooo:rsid="000c3acf" officeooo:paragraph-rsid="000c3acf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🛠️ Como Compilar e Montar a Imagem do LBF OS</text:h>
      <text:p text:style-name="Text_20_body">Para testar o LBF OS no VirtualBox ou em hardware real, precisamos unir os binários compilados (<text:span text:style-name="Source_20_Text">boot.bin</text:span> e <text:span text:style-name="Source_20_Text">kernel.bin</text:span>), empacotar os programas de usuário (<text:span text:style-name="Source_20_Text">.elf</text:span>) em um sistema de arquivos FAT32 e gerar a imagem final.</text:p>
      <text:h text:style-name="Heading_20_4" text:outline-level="4">Parte 1: Script Bash para Criação da Imagem Raw (<text:span text:style-name="Source_20_Text">.img</text:span>)</text:h>
      <text:p text:style-name="Text_20_body">Se você estiver no Linux (ou WSL), execute os comandos abaixo para gerar o <text:span text:style-name="Source_20_Text">disco_total.img</text:span>:</text:p>
      <text:p text:style-name="P1">Bash</text:p>
      <text:p text:style-name="Preformatted_20_Text"><text:span text:style-name="Source_20_Text"># 1. Cria a imagem do disco de dados (FAT32) e formata</text:span></text:p>
      <text:p text:style-name="Preformatted_20_Text"><text:span text:style-name="Source_20_Text">rm -f ssd.img</text:span></text:p>
      <text:p text:style-name="Preformatted_20_Text"><text:span text:style-name="Source_20_Text">dd if=/dev/zero of=ssd.img bs=1M count=100</text:span></text:p>
      <text:p text:style-name="Preformatted_20_Text"><text:span text:style-name="Source_20_Text">sudo mkfs.vfat -F 32 ssd.img</text:span></text:p>
      <text:p text:style-name="Preformatted_20_Text"/>
      <text:p text:style-name="Preformatted_20_Text"><text:span text:style-name="Source_20_Text"># 2. Insere os softwares e o compositor (Ring 3) dentro do disco FAT32</text:span></text:p>
      <text:p text:style-name="Preformatted_20_Text"><text:span text:style-name="Source_20_Text"># (Requer o pacote mtools instalado)</text:span></text:p>
      <text:p text:style-name="Preformatted_20_Text"><text:span text:style-name="Source_20_Text"/></text:p>
      <text:p text:style-name="Preformatted_20_Text"><text:span text:style-name="Source_20_Text">mcopy -i ssd.img explorer.elf ::/</text:span></text:p>
      <text:p text:style-name="Preformatted_20_Text"><text:span text:style-name="Source_20_Text"/></text:p>
      <text:p text:style-name="Preformatted_20_Text"><text:span text:style-name="Source_20_Text"># Adicione outros softwares aqui, ex: mcopy -i ssd.img app.elf ::/</text:span></text:p>
      <text:p text:style-name="Preformatted_20_Text"/>
      <text:p text:style-name="Preformatted_20_Text"><text:span text:style-name="Source_20_Text"># 3. Cria a Imagem Mestre Bootável do S.O.</text:span></text:p>
      <text:p text:style-name="Preformatted_20_Text"><text:span text:style-name="Source_20_Text">rm -f disco_total.img</text:span></text:p>
      <text:p text:style-name="Preformatted_20_Text"><text:span text:style-name="Source_20_Text">dd if=/dev/zero of=disco_total.img bs=1M count=101</text:span></text:p>
      <text:p text:style-name="Preformatted_20_Text"/>
      <text:p text:style-name="Preformatted_20_Text"><text:span text:style-name="Source_20_Text"># Injeta o Bootloader no Setor 0 e o Kernel no Setor 1</text:span></text:p>
      <text:p text:style-name="Preformatted_20_Text"><text:span text:style-name="Source_20_Text">dd if=boot.bin of=disco_total.img bs=512 count=1 conv=notrunc</text:span></text:p>
      <text:p text:style-name="Preformatted_20_Text"><text:span text:style-name="Source_20_Text">dd if=kernel.bin of=disco_total.img bs=512 seek=1 conv=notrunc</text:span></text:p>
      <text:p text:style-name="Preformatted_20_Text"/>
      <text:p text:style-name="Preformatted_20_Text"><text:span text:style-name="Source_20_Text"># Injeta o disco FAT32 (ssd.img) a partir do setor 2048 (Offset de 1MB)</text:span></text:p>
      <text:p text:style-name="Preformatted_20_Text"><text:span text:style-name="Source_20_Text"># Isso protege o Bootloader/Kernel e permite que o S.O. encontre os arquivos.</text:span></text:p>
      <text:p text:style-name="P2"><text:span text:style-name="Source_20_Text">dd if=ssd.img of=disco_total.img seek=2048 conv=notrunc</text:span></text:p>
      <text:h text:style-name="Heading_20_4" text:outline-level="4">Parte 2: Convertendo para VirtualBox (<text:span text:style-name="Source_20_Text">.vdi</text:span>) no Windows</text:h>
      <text:p text:style-name="Text_20_body">Com o <text:span text:style-name="Source_20_Text">disco_total.img</text:span> criado, mova-o para uma pasta no Windows. Para que você não precise recriar a máquina virtual a cada nova compilação, vamos converter a imagem para o formato <text:span text:style-name="Source_20_Text">.vdi</text:span> injetando um <text:span text:style-name="T1">UUID Fixo</text:span>.</text:p>
      <text:p text:style-name="Text_20_body">Abra o Prompt de Comando na pasta onde está a imagem e execute:</text:p>
      <text:p text:style-name="Standard">"C:\Program Files\Oracle\VirtualBox\VBoxManage.exe" convertfromraw disco_total.img disco_total.vdi --variant Fixed --uuid {f7cc1a54-2cd7-4dcd-b578-1cca32ad320c}</text:p>
      <text:p text:style-name="Standard"/>
      <text:p text:style-name="Text_20_body"><text:span text:style-name="T2">(Nota: Substitua o caminho do </text:span><text:span text:style-name="Source_20_Text"><text:span text:style-name="T2">VBoxManage.exe</text:span></text:span><text:span text:style-name="T2"> se o seu VirtualBox estiver instalado em outro local).</text:span></text:p>
      <text:h text:style-name="Heading_20_3" text:outline-level="3">🖥️ Configuração Oficial da Máquina Virtual (VirtualBox)</text:h>
      <text:p text:style-name="Text_20_body">Para que o LBF OS tenha acesso correto aos barramentos de hardware (SATA, Vídeo Framebuffer, USB, etc.), configure a nova máquina virtual <text:span text:style-name="T1">exatamente</text:span> com os parâmetros abaixo, que formam o ambiente homologado do sistema:</text:p>
      <text:list text:style-name="L1">
        <text:list-item>
          <text:p text:style-name="P3"><text:soft-page-break/>Geral:</text:p>
          <text:list>
            <text:list-item>
              <text:p text:style-name="P4"><text:span text:style-name="T1">Tipo:</text:span> Linux</text:p>
            </text:list-item>
            <text:list-item>
              <text:p text:style-name="P4"><text:span text:style-name="T1">Versão:</text:span> Other Linux (64-bit)</text:p>
            </text:list-item>
          </text:list>
        </text:list-item>
        <text:list-item>
          <text:p text:style-name="P3">Sistema:</text:p>
          <text:list>
            <text:list-item>
              <text:p text:style-name="P4"><text:span text:style-name="T1">Memória Base (RAM):</text:span> 4096 MB (4 GB)</text:p>
            </text:list-item>
            <text:list-item>
              <text:p text:style-name="P4"><text:span text:style-name="T1">Ordem de Boot:</text:span> Desmarque Disquete, deixe apenas Óptico e Disco Rígido.</text:p>
            </text:list-item>
            <text:list-item>
              <text:p text:style-name="P4"><text:span text:style-name="T1">Aceleração:</text:span> Habilitar VT-x/AMD-V, Paginação Aninhada, PAE/NX.</text:p>
            </text:list-item>
          </text:list>
        </text:list-item>
        <text:list-item>
          <text:p text:style-name="P3">Tela (Importante para o Compositor Gráfico):</text:p>
          <text:list>
            <text:list-item>
              <text:p text:style-name="P4"><text:span text:style-name="T1">Memória de Vídeo:</text:span> 128 MB</text:p>
            </text:list-item>
            <text:list-item>
              <text:p text:style-name="P4"><text:span text:style-name="T1">Controladora Gráfica:</text:span> <text:span text:style-name="T1">VMSVGA</text:span> <text:span text:style-name="T2">(obrigatório para compatibilidade correta do Framebuffer VBE do LBF OS).</text:span></text:p>
            </text:list-item>
          </text:list>
        </text:list-item>
        <text:list-item>
          <text:p text:style-name="P3">Armazenamento (Crucial para o driver AHCI do Kernel):</text:p>
          <text:list>
            <text:list-item>
              <text:p text:style-name="P4"><text:span text:style-name="T1">Controladora SATA:</text:span> Selecione a controladora <text:span text:style-name="T1">AHCI</text:span>.</text:p>
            </text:list-item>
            <text:list-item>
              <text:p text:style-name="P4"><text:span text:style-name="T1">Disco:</text:span> Adicione o seu <text:span text:style-name="Source_20_Text">disco_total.vdi</text:span> recém-convertido na Porta SATA 0.</text:p>
            </text:list-item>
          </text:list>
        </text:list-item>
        <text:list-item>
          <text:p text:style-name="P3">USB:</text:p>
          <text:list>
            <text:list-item>
              <text:p text:style-name="P4"><text:span text:style-name="T1">Controladora:</text:span> OHCI, EHCI (USB 2.0/3.0).</text:p>
            </text:list-item>
          </text:list>
        </text:list-item>
      </text:list>
      <text:p text:style-name="Text_20_body">Feito isso, basta ligar a máquina virtual e acompanhar o boot do LBF OS diretamente pelo seu disco SATA construído do zero!</text:p>
      <text:p text:style-name="P5">Observação importante: ao iniciar o S.O. no Virtual Box ele irá demorar iniciar, fica com tela preta para iniciar o SATA, depois O EHCI, assim, não é instantaneo demora um pouc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8.4.2$Linux_X86_64 LibreOffice_project/580$Build-2</meta:generator>
    <dc:date>2026-06-20T16:16:19.822276940</dc:date>
    <meta:editing-duration>PT6M49S</meta:editing-duration>
    <meta:editing-cycles>5</meta:editing-cycles>
    <meta:document-statistic meta:table-count="0" meta:image-count="0" meta:object-count="0" meta:page-count="2" meta:paragraph-count="46" meta:word-count="484" meta:character-count="3019" meta:non-whitespace-character-count="2598"/>
  </office:meta>
</office:document-meta>
</file>