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LBF OS — Lightweight Binary Framework Operating System</text:h>
      <text:p text:style-name="Text_20_body">Um sistema operacional 64-bit com arquitetura modular baseada em Ring 0 / Ring 3, syscall nativa, compositor gráfico próprio (Explorer.elf) e runtime gráfico integrado.</text:p>
      <text:p text:style-name="Horizontal_20_Line"/>
      <text:h text:style-name="Heading_20_1" text:outline-level="1">🧠 Visão Geral da Arquitetura</text:h>
      <text:p text:style-name="Text_20_body">O LBF OS é um sistema operacional completo dividido em dois mundos principais:</text:p>
      <text:list text:style-name="L1">
        <text:list-item>
          <text:p text:style-name="P1">🔴 <text:span text:style-name="Strong_20_Emphasis">Kernel (Ring 0)</text:span> → controle total de hardware, memória, processos e syscalls </text:p>
        </text:list-item>
        <text:list-item>
          <text:p text:style-name="P2">🟡 <text:span text:style-name="Strong_20_Emphasis">Userland (Ring 3)</text:span> → aplicações, runtime gráfico, Explorer e SDK nativo </text:p>
        </text:list-item>
      </text:list>
      <text:p text:style-name="Horizontal_20_Line"/>
      <text:h text:style-name="Heading_20_1" text:outline-level="1">🧱 Arquitetura Geral do Sistema</text:h>
      <text:section text:style-name="Sect1" text:name="code-block-viewer">
        <text:p text:style-name="P3"><text:span text:style-name="Source_20_Text">+---------------------------------------------------+</text:span></text:p>
        <text:p text:style-name="Preformatted_20_Text"><text:span text:style-name="Source_20_Text">| <text:s text:c="15"/>USER SPACE (RING 3) <text:s text:c="14"/>|</text:span></text:p>
        <text:p text:style-name="Preformatted_20_Text"><text:span text:style-name="Source_20_Text">|---------------------------------------------------|</text:span></text:p>
        <text:p text:style-name="Preformatted_20_Text"><text:span text:style-name="Source_20_Text">| Applications (.elf) <text:s text:c="29"/>|</text:span></text:p>
        <text:p text:style-name="Preformatted_20_Text"><text:span text:style-name="Source_20_Text">| GUI Runtime (Buttons, Forms, Labels) <text:s text:c="11"/>|</text:span></text:p>
        <text:p text:style-name="Preformatted_20_Text"><text:span text:style-name="Source_20_Text">| Runtime IA (Neural modules) <text:s text:c="20"/>|</text:span></text:p>
        <text:p text:style-name="Preformatted_20_Text"><text:span text:style-name="Source_20_Text">| liblib.h (SDK / Syscall Interface) <text:s text:c="13"/>|</text:span></text:p>
        <text:p text:style-name="Preformatted_20_Text"><text:span text:style-name="Source_20_Text">| Explorer.elf (Compositor / Window Manager) <text:s text:c="5"/>|</text:span></text:p>
        <text:p text:style-name="Preformatted_20_Text"><text:span text:style-name="Source_20_Text">| IPC System (Events, Mouse, Keyboard) <text:s text:c="11"/>|</text:span></text:p>
        <text:p text:style-name="Preformatted_20_Text"><text:span text:style-name="Source_20_Text">+---------------------------------------------------+</text:span></text:p>
        <text:p text:style-name="Preformatted_20_Text"><text:span text:style-name="Source_20_Text"><text:s text:c="16"/>↓ SYSCALL (INT 0x80)</text:span></text:p>
        <text:p text:style-name="Preformatted_20_Text"><text:span text:style-name="Source_20_Text">+---------------------------------------------------+</text:span></text:p>
        <text:p text:style-name="Preformatted_20_Text"><text:span text:style-name="Source_20_Text">| <text:s text:c="15"/>KERNEL SPACE (RING 0) <text:s text:c="11"/>|</text:span></text:p>
        <text:p text:style-name="Preformatted_20_Text"><text:span text:style-name="Source_20_Text">|---------------------------------------------------|</text:span></text:p>
        <text:p text:style-name="Preformatted_20_Text"><text:span text:style-name="Source_20_Text">| Process Scheduler <text:s text:c="30"/>|</text:span></text:p>
        <text:p text:style-name="Preformatted_20_Text"><text:span text:style-name="Source_20_Text">| Memory Manager (PMM / VMM / KMALLOC) <text:s text:c="11"/>|</text:span></text:p>
        <text:p text:style-name="Preformatted_20_Text"><text:span text:style-name="Source_20_Text">| Filesystem (FAT32 custom layer) <text:s text:c="16"/>|</text:span></text:p>
        <text:p text:style-name="Preformatted_20_Text"><text:span text:style-name="Source_20_Text">| Drivers (Keyboard, Mouse, Video, Disk, UART) <text:s text:c="3"/>|</text:span></text:p>
        <text:p text:style-name="Preformatted_20_Text"><text:span text:style-name="Source_20_Text">| Syscall Handler (syscall.c) <text:s text:c="20"/>|</text:span></text:p>
        <text:p text:style-name="Preformatted_20_Text"><text:span text:style-name="Source_20_Text">| Interrupt System (IDT / PIC / IRQ) <text:s text:c="13"/>|</text:span></text:p>
        <text:p text:style-name="P4"><text:span text:style-name="Source_20_Text">+---------------------------------------------------+</text:span></text:p>
      </text:section>
      <text:p text:style-name="Horizontal_20_Line"/>
      <text:h text:style-name="Heading_20_1" text:outline-level="1">🔴 Kernel (Ring 0)</text:h>
      <text:p text:style-name="Text_20_body">O kernel pode operar sozinho, sem qualquer interface gráfica.</text:p>
      <text:h text:style-name="Heading_20_2" text:outline-level="2">🧠 Responsabilidades</text:h>
      <text:list text:style-name="L2">
        <text:list-item>
          <text:p text:style-name="P5">Boot em múltiplas fases </text:p>
          <text:list>
            <text:list-item>
              <text:p text:style-name="P5">boot.asm (16 bits) </text:p>
            </text:list-item>
            <text:list-item>
              <text:p text:style-name="P5"><text:soft-page-break/>kernel.asm (32 bits) </text:p>
            </text:list-item>
            <text:list-item>
              <text:p text:style-name="P5">long mode (64 bits) </text:p>
            </text:list-item>
            <text:list-item>
              <text:p text:style-name="P5">kernel.c </text:p>
            </text:list-item>
          </text:list>
        </text:list-item>
        <text:list-item>
          <text:p text:style-name="P5">Gerenciamento de memória </text:p>
          <text:list>
            <text:list-item>
              <text:p text:style-name="P5">PMM (Physical Memory Manager) </text:p>
            </text:list-item>
            <text:list-item>
              <text:p text:style-name="P5">VMM (Virtual Memory Manager) </text:p>
            </text:list-item>
            <text:list-item>
              <text:p text:style-name="P5">KMALLOC (Heap dinâmico) </text:p>
            </text:list-item>
          </text:list>
        </text:list-item>
        <text:list-item>
          <text:p text:style-name="P5">Sistema de processos </text:p>
          <text:list>
            <text:list-item>
              <text:p text:style-name="P5">ELF loader </text:p>
            </text:list-item>
            <text:list-item>
              <text:p text:style-name="P5">Scheduler multitarefa </text:p>
            </text:list-item>
            <text:list-item>
              <text:p text:style-name="P5">isolamento por CR3/PML4 </text:p>
            </text:list-item>
          </text:list>
        </text:list-item>
        <text:list-item>
          <text:p text:style-name="P5">Filesystem </text:p>
          <text:list>
            <text:list-item>
              <text:p text:style-name="P5">FAT32 custom multi-módulo </text:p>
            </text:list-item>
          </text:list>
        </text:list-item>
        <text:list-item>
          <text:p text:style-name="P5">Drivers </text:p>
          <text:list>
            <text:list-item>
              <text:p text:style-name="P5">Keyboard / Mouse </text:p>
            </text:list-item>
            <text:list-item>
              <text:p text:style-name="P5">Video (framebuffer + double buffering) </text:p>
            </text:list-item>
            <text:list-item>
              <text:p text:style-name="P5">Disk / AHCI </text:p>
            </text:list-item>
            <text:list-item>
              <text:p text:style-name="P5">UART / Serial </text:p>
            </text:list-item>
            <text:list-item>
              <text:p text:style-name="P5">PCI / EHCI </text:p>
            </text:list-item>
          </text:list>
        </text:list-item>
        <text:list-item>
          <text:p text:style-name="P5">Syscalls </text:p>
          <text:list>
            <text:list-item>
              <text:p text:style-name="P6">Interface direta via <text:span text:style-name="Source_20_Text">int 0x80</text:span> </text:p>
            </text:list-item>
          </text:list>
        </text:list-item>
      </text:list>
      <text:p text:style-name="Horizontal_20_Line"/>
      <text:h text:style-name="Heading_20_2" text:outline-level="2">⚙️ Build do Kernel</text:h>
      <text:section text:style-name="Sect1" text:name="Seção1">
        <text:p text:style-name="P3"><text:bookmark text:name="code-block-viewer"/><text:span text:style-name="Source_20_Text">ld -m elf_x86_64 -T linker.ld --gc-sections -o kernel.bin \</text:span></text:p>
        <text:p text:style-name="Preformatted_20_Text"><text:span text:style-name="Source_20_Text">kernel_asm.o kernel_c.o \</text:span></text:p>
        <text:p text:style-name="Preformatted_20_Text"><text:span text:style-name="Source_20_Text">drivers/*.o mem/*.o fs/*.o util/*.o \</text:span></text:p>
        <text:p text:style-name="P4"><text:span text:style-name="Source_20_Text">--oformat binary</text:span></text:p>
      </text:section>
      <text:p text:style-name="Horizontal_20_Line"/>
      <text:h text:style-name="Heading_20_1" text:outline-level="1">🟡 liblib.h — SDK do Sistema (Ring 3 API)</text:h>
      <text:p text:style-name="Text_20_body">A <text:span text:style-name="Source_20_Text">liblib.h</text:span> é a interface oficial entre aplicações e o kernel.</text:p>
      <text:p text:style-name="Text_20_body">Ela substitui completamente libc / POSIX / Windows API.</text:p>
      <text:p text:style-name="Horizontal_20_Line"/>
      <text:h text:style-name="Heading_20_2" text:outline-level="2">🔗 Funções principais</text:h>
      <text:h text:style-name="Heading_20_3" text:outline-level="3">📂 Sistema de arquivos</text:h>
      <text:list text:style-name="L3">
        <text:list-item>
          <text:p text:style-name="P7">sys_open </text:p>
        </text:list-item>
        <text:list-item>
          <text:p text:style-name="P7">sys_read </text:p>
        </text:list-item>
        <text:list-item>
          <text:p text:style-name="P8">sys_write </text:p>
        </text:list-item>
      </text:list>
      <text:h text:style-name="Heading_20_3" text:outline-level="3"><text:soft-page-break/>🧠 Processos</text:h>
      <text:list text:style-name="L4">
        <text:list-item>
          <text:p text:style-name="P9">sys_exec </text:p>
        </text:list-item>
        <text:list-item>
          <text:p text:style-name="P9">sys_exit </text:p>
        </text:list-item>
        <text:list-item>
          <text:p text:style-name="P9">sys_kill </text:p>
        </text:list-item>
        <text:list-item>
          <text:p text:style-name="P10">sys_get_pid </text:p>
        </text:list-item>
      </text:list>
      <text:h text:style-name="Heading_20_3" text:outline-level="3">💾 Memória</text:h>
      <text:list text:style-name="L5">
        <text:list-item>
          <text:p text:style-name="P11">sys_sbrk </text:p>
        </text:list-item>
      </text:list>
      <text:h text:style-name="Heading_20_3" text:outline-level="3">⏱ Sistema</text:h>
      <text:list text:style-name="L6">
        <text:list-item>
          <text:p text:style-name="P12">sys_sleep </text:p>
        </text:list-item>
        <text:list-item>
          <text:p text:style-name="P13">sys_get_ticks </text:p>
        </text:list-item>
      </text:list>
      <text:h text:style-name="Heading_20_3" text:outline-level="3">🖥 Gráficos / Input</text:h>
      <text:list text:style-name="L7">
        <text:list-item>
          <text:p text:style-name="P14">video_flip </text:p>
        </text:list-item>
        <text:list-item>
          <text:p text:style-name="P14">get_mouse </text:p>
        </text:list-item>
        <text:list-item>
          <text:p text:style-name="P14">get_key </text:p>
        </text:list-item>
        <text:list-item>
          <text:p text:style-name="P15">get_video_info </text:p>
        </text:list-item>
      </text:list>
      <text:h text:style-name="Heading_20_3" text:outline-level="3">📡 Serial / Hardware</text:h>
      <text:list text:style-name="L8">
        <text:list-item>
          <text:p text:style-name="P16">sys_serial_open </text:p>
        </text:list-item>
        <text:list-item>
          <text:p text:style-name="P16">sys_serial_write </text:p>
        </text:list-item>
        <text:list-item>
          <text:p text:style-name="P17">sys_serial_read </text:p>
        </text:list-item>
      </text:list>
      <text:p text:style-name="Horizontal_20_Line"/>
      <text:h text:style-name="Heading_20_2" text:outline-level="2">⚙️ Syscall mechanism</text:h>
      <text:p text:style-name="Text_20_body">Todas as chamadas passam por:</text:p>
      <text:section text:style-name="Sect1" text:name="Seção2">
        <text:p text:style-name="P18"><text:bookmark text:name="code-block-viewer Copia 1"/><text:span text:style-name="Source_20_Text">int $0x80</text:span></text:p>
      </text:section>
      <text:p text:style-name="Horizontal_20_Line"/>
      <text:h text:style-name="Heading_20_2" text:outline-level="2">📌 Importante</text:h>
      <text:list text:style-name="L9">
        <text:list-item>
          <text:p text:style-name="P19">Não existe <text:span text:style-name="Source_20_Text">stdio.h</text:span> </text:p>
        </text:list-item>
        <text:list-item>
          <text:p text:style-name="P19">Não existe <text:span text:style-name="Source_20_Text">libc</text:span> </text:p>
        </text:list-item>
        <text:list-item>
          <text:p text:style-name="P19">Não existe POSIX </text:p>
        </text:list-item>
        <text:list-item>
          <text:p text:style-name="P20">Qualquer linguagem precisa compilar para ELF do sistema </text:p>
        </text:list-item>
      </text:list>
      <text:p text:style-name="Horizontal_20_Line"/>
      <text:h text:style-name="Heading_20_1" text:outline-level="1"><text:soft-page-break/>🟢 Explorer.elf — Compositor e Window Manager</text:h>
      <text:p text:style-name="Text_20_body">O Explorer é o coração visual do sistema.</text:p>
      <text:p text:style-name="Text_20_body">Ele roda em Ring 3, mas com papel privilegiado.</text:p>
      <text:p text:style-name="Horizontal_20_Line"/>
      <text:h text:style-name="Heading_20_2" text:outline-level="2">🧠 Funções principais</text:h>
      <text:list text:style-name="L10">
        <text:list-item>
          <text:p text:style-name="P21">Window Manager </text:p>
        </text:list-item>
        <text:list-item>
          <text:p text:style-name="P21">Compositor gráfico </text:p>
        </text:list-item>
        <text:list-item>
          <text:p text:style-name="P21">IPC entre processos </text:p>
        </text:list-item>
        <text:list-item>
          <text:p text:style-name="P21">Gerenciamento de eventos </text:p>
        </text:list-item>
        <text:list-item>
          <text:p text:style-name="P21">Controle de mouse e teclado </text:p>
        </text:list-item>
        <text:list-item>
          <text:p text:style-name="P21">Z-order (camadas) </text:p>
        </text:list-item>
        <text:list-item>
          <text:p text:style-name="P21">Containers por processo </text:p>
        </text:list-item>
        <text:list-item>
          <text:p text:style-name="P21">Merge de framebuffers </text:p>
        </text:list-item>
        <text:list-item>
          <text:p text:style-name="P22">Double buffering → VRAM flip </text:p>
        </text:list-item>
      </text:list>
      <text:p text:style-name="Horizontal_20_Line"/>
      <text:h text:style-name="Heading_20_2" text:outline-level="2">📦 Modelo de execução</text:h>
      <text:p text:style-name="Text_20_body">Cada aplicação <text:span text:style-name="Source_20_Text">.elf</text:span>:</text:p>
      <text:list text:style-name="L11">
        <text:list-item>
          <text:p text:style-name="P23">tem seu próprio framebuffer </text:p>
        </text:list-item>
        <text:list-item>
          <text:p text:style-name="P23">roda isolada em container </text:p>
        </text:list-item>
        <text:list-item>
          <text:p text:style-name="P24">envia dados via IPC </text:p>
        </text:list-item>
      </text:list>
      <text:p text:style-name="Horizontal_20_Line"/>
      <text:h text:style-name="Heading_20_2" text:outline-level="2">🎨 Pipeline gráfico</text:h>
      <text:section text:style-name="Sect1" text:name="Seção3">
        <text:p text:style-name="P3"><text:bookmark text:name="code-block-viewer Copia 2"/><text:span text:style-name="Source_20_Text">App (.elf)</text:span></text:p>
        <text:p text:style-name="Preformatted_20_Text"><text:span text:style-name="Source_20_Text"><text:s text:c="3"/>↓</text:span></text:p>
        <text:p text:style-name="Preformatted_20_Text"><text:span text:style-name="Source_20_Text">Framebuffer individual</text:span></text:p>
        <text:p text:style-name="Preformatted_20_Text"><text:span text:style-name="Source_20_Text"><text:s text:c="3"/>↓</text:span></text:p>
        <text:p text:style-name="Preformatted_20_Text"><text:span text:style-name="Source_20_Text">Explorer.elf (compositor)</text:span></text:p>
        <text:p text:style-name="Preformatted_20_Text"><text:span text:style-name="Source_20_Text"><text:s text:c="3"/>↓</text:span></text:p>
        <text:p text:style-name="Preformatted_20_Text"><text:span text:style-name="Source_20_Text">Backbuffer global</text:span></text:p>
        <text:p text:style-name="Preformatted_20_Text"><text:span text:style-name="Source_20_Text"><text:s text:c="3"/>↓</text:span></text:p>
        <text:p text:style-name="Preformatted_20_Text"><text:span text:style-name="Source_20_Text">video_flip()</text:span></text:p>
        <text:p text:style-name="Preformatted_20_Text"><text:span text:style-name="Source_20_Text"><text:s text:c="3"/>↓</text:span></text:p>
        <text:p text:style-name="P4"><text:span text:style-name="Source_20_Text">VRAM (tela final)</text:span></text:p>
      </text:section>
      <text:p text:style-name="Horizontal_20_Line"/>
      <text:h text:style-name="Heading_20_2" text:outline-level="2">📌 Conceito central</text:h>
      <text:p text:style-name="Text_20_body">O Explorer não desenha apps.</text:p>
      <text:p text:style-name="Text_20_body"><text:soft-page-break/>Ele <text:span text:style-name="Strong_20_Emphasis">compõe buffers independentes de processos isolados</text:span>.</text:p>
      <text:p text:style-name="Horizontal_20_Line"/>
      <text:h text:style-name="Heading_20_1" text:outline-level="1">🟣 Runtime GUI (Sistema de Interface Gráfica)</text:h>
      <text:p text:style-name="Text_20_body">Biblioteca de alto nível executada dentro do Explorer.</text:p>
      <text:h text:style-name="Heading_20_2" text:outline-level="2">🧩 Componentes</text:h>
      <text:list text:style-name="L12">
        <text:list-item>
          <text:p text:style-name="P25">Button </text:p>
        </text:list-item>
        <text:list-item>
          <text:p text:style-name="P25">Label </text:p>
        </text:list-item>
        <text:list-item>
          <text:p text:style-name="P25">Edit </text:p>
        </text:list-item>
        <text:list-item>
          <text:p text:style-name="P25">Form </text:p>
        </text:list-item>
        <text:list-item>
          <text:p text:style-name="P25">Combobox </text:p>
        </text:list-item>
        <text:list-item>
          <text:p text:style-name="P25">Memo </text:p>
        </text:list-item>
        <text:list-item>
          <text:p text:style-name="P25">Radio button </text:p>
        </text:list-item>
        <text:list-item>
          <text:p text:style-name="P26">Panels </text:p>
        </text:list-item>
      </text:list>
      <text:p text:style-name="Horizontal_20_Line"/>
      <text:h text:style-name="Heading_20_2" text:outline-level="2">📌 Características</text:h>
      <text:list text:style-name="L13">
        <text:list-item>
          <text:p text:style-name="P27">estilo RAD (Delphi 7-like) </text:p>
        </text:list-item>
        <text:list-item>
          <text:p text:style-name="P27">já compilado e funcional </text:p>
        </text:list-item>
        <text:list-item>
          <text:p text:style-name="P27">programador só escreve lógica </text:p>
        </text:list-item>
        <text:list-item>
          <text:p text:style-name="P28">não precisa reconstruir GUI base </text:p>
        </text:list-item>
      </text:list>
      <text:p text:style-name="Horizontal_20_Line"/>
      <text:h text:style-name="Heading_20_1" text:outline-level="1">🔵 Runtime IA</text:h>
      <text:p text:style-name="Text_20_body">Camada de inteligência artificial integrada ao sistema.</text:p>
      <text:h text:style-name="Heading_20_2" text:outline-level="2">🧠 Funções</text:h>
      <text:list text:style-name="L14">
        <text:list-item>
          <text:p text:style-name="P29">módulos de IA </text:p>
        </text:list-item>
        <text:list-item>
          <text:p text:style-name="P29">“neurônios” persistidos em arquivos </text:p>
        </text:list-item>
        <text:list-item>
          <text:p text:style-name="P29">aprendizado incremental </text:p>
        </text:list-item>
        <text:list-item>
          <text:p text:style-name="P30">recompilação de conhecimento </text:p>
        </text:list-item>
      </text:list>
      <text:p text:style-name="Horizontal_20_Line"/>
      <text:h text:style-name="Heading_20_2" text:outline-level="2">📌 Modelo</text:h>
      <text:list text:style-name="L15">
        <text:list-item>
          <text:p text:style-name="P31">conhecimento salvo em arquivos </text:p>
        </text:list-item>
        <text:list-item>
          <text:p text:style-name="P31">convertido em módulos executáveis </text:p>
        </text:list-item>
        <text:list-item>
          <text:p text:style-name="P32"><text:soft-page-break/>integrado ao runtime </text:p>
        </text:list-item>
      </text:list>
      <text:p text:style-name="Horizontal_20_Line"/>
      <text:h text:style-name="Heading_20_1" text:outline-level="1">🧩 Relação entre os níveis</text:h>
      <text:section text:style-name="Sect1" text:name="Seção4">
        <text:p text:style-name="P3"><text:bookmark text:name="code-block-viewer Copia 3"/><text:span text:style-name="Source_20_Text">RING 0 (Kernel)</text:span></text:p>
        <text:p text:style-name="Preformatted_20_Text"><text:span text:style-name="Source_20_Text"><text:s text:c="3"/>↓ syscall (int 0x80)</text:span></text:p>
        <text:p text:style-name="Preformatted_20_Text"><text:span text:style-name="Source_20_Text">liblib.h (SDK)</text:span></text:p>
        <text:p text:style-name="Preformatted_20_Text"><text:span text:style-name="Source_20_Text"><text:s text:c="3"/>↓ ELF user programs</text:span></text:p>
        <text:p text:style-name="Preformatted_20_Text"><text:span text:style-name="Source_20_Text">Explorer.elf (compositor)</text:span></text:p>
        <text:p text:style-name="Preformatted_20_Text"><text:span text:style-name="Source_20_Text"><text:s text:c="3"/>↓ IPC + framebuffer</text:span></text:p>
        <text:p text:style-name="Preformatted_20_Text"><text:span text:style-name="Source_20_Text">GUI Runtime / IA Runtime</text:span></text:p>
        <text:p text:style-name="Preformatted_20_Text"><text:span text:style-name="Source_20_Text"><text:s text:c="3"/>↓ aplicações finais</text:span></text:p>
        <text:p text:style-name="P4"><text:span text:style-name="Source_20_Text">software.elf</text:span></text:p>
      </text:section>
      <text:p text:style-name="Horizontal_20_Line"/>
      <text:h text:style-name="Heading_20_1" text:outline-level="1">🔐 Arquitetura Fundamental</text:h>
      <text:p text:style-name="Text_20_body">O LBF OS não é um sistema tradicional.</text:p>
      <text:p text:style-name="Text_20_body">Ele segue três princípios:</text:p>
      <text:h text:style-name="Heading_20_3" text:outline-level="3">1. Kernel independente</text:h>
      <text:list text:style-name="L16">
        <text:list-item>
          <text:p text:style-name="P33">funciona sozinho </text:p>
        </text:list-item>
        <text:list-item>
          <text:p text:style-name="P34">terminal funcional </text:p>
        </text:list-item>
      </text:list>
      <text:h text:style-name="Heading_20_3" text:outline-level="3">2. SDK obrigatório (liblib.h)</text:h>
      <text:list text:style-name="L17">
        <text:list-item>
          <text:p text:style-name="P35">define todo userland </text:p>
        </text:list-item>
        <text:list-item>
          <text:p text:style-name="P36">substitui libc/POSIX </text:p>
        </text:list-item>
      </text:list>
      <text:h text:style-name="Heading_20_3" text:outline-level="3">3. Compositor obrigatório</text:h>
      <text:list text:style-name="L18">
        <text:list-item>
          <text:p text:style-name="P37">Explorer não é opcional </text:p>
        </text:list-item>
        <text:list-item>
          <text:p text:style-name="P38">sistema gráfico depende dele </text:p>
        </text:list-item>
      </text:list>
      <text:p text:style-name="Horizontal_20_Line"/>
      <text:h text:style-name="Heading_20_1" text:outline-level="1">💡 Modelo gráfico (conceito central)</text:h>
      <text:list text:style-name="L19">
        <text:list-item>
          <text:p text:style-name="P39">cada processo desenha seu próprio buffer </text:p>
        </text:list-item>
        <text:list-item>
          <text:p text:style-name="P39">Explorer coleta via IPC </text:p>
        </text:list-item>
        <text:list-item>
          <text:p text:style-name="P39">compositor une tudo </text:p>
        </text:list-item>
        <text:list-item>
          <text:p text:style-name="P40">VRAM recebe frame final </text:p>
        </text:list-item>
      </text:list>
      <text:p text:style-name="Horizontal_20_Line"/>
      <text:h text:style-name="Heading_20_1" text:outline-level="1"><text:soft-page-break/>📌 Segurança e isolamento</text:h>
      <text:list text:style-name="L20">
        <text:list-item>
          <text:p text:style-name="P41">cada processo possui PML4/CR3 próprio </text:p>
        </text:list-item>
        <text:list-item>
          <text:p text:style-name="P41">isolamento total de memória </text:p>
        </text:list-item>
        <text:list-item>
          <text:p text:style-name="P41">comunicação apenas via IPC </text:p>
        </text:list-item>
        <text:list-item>
          <text:p text:style-name="P42">sem acesso direto entre processos </text:p>
        </text:list-item>
      </text:list>
      <text:p text:style-name="Horizontal_20_Line"/>
      <text:h text:style-name="Heading_20_1" text:outline-level="1">🚧 Status do projeto</text:h>
      <text:list text:style-name="L21">
        <text:list-item>
          <text:p text:style-name="P43">✔ Kernel 64-bit funcional </text:p>
        </text:list-item>
        <text:list-item>
          <text:p text:style-name="P43">✔ Syscall system implementado </text:p>
        </text:list-item>
        <text:list-item>
          <text:p text:style-name="P43">✔ FAT32 custom </text:p>
        </text:list-item>
        <text:list-item>
          <text:p text:style-name="P43">✔ Explorer compositor funcional </text:p>
        </text:list-item>
        <text:list-item>
          <text:p text:style-name="P43">✔ GUI runtime ativo </text:p>
        </text:list-item>
        <text:list-item>
          <text:p text:style-name="P43">⚠ RAD GUI builder em desenvolvimento </text:p>
        </text:list-item>
        <text:list-item>
          <text:p text:style-name="P44">⚠ IA runtime em expansão </text:p>
        </text:list-item>
      </text:list>
      <text:p text:style-name="Horizontal_20_Line"/>
      <text:h text:style-name="Heading_20_1" text:outline-level="1">🛠️ Requisitos</text:h>
      <text:list text:style-name="L22">
        <text:list-item>
          <text:p text:style-name="P45">GCC cross-compiler (x86_64-elf) </text:p>
        </text:list-item>
        <text:list-item>
          <text:p text:style-name="P45">NASM </text:p>
        </text:list-item>
        <text:list-item>
          <text:p text:style-name="P45">LD linker </text:p>
        </text:list-item>
        <text:list-item>
          <text:p text:style-name="P46">QEMU / VirtualBox </text:p>
        </text:list-item>
      </text:list>
      <text:p text:style-name="Horizontal_20_Line"/>
      <text:h text:style-name="Heading_20_1" text:outline-level="1">📜 Licença</text:h>
      <text:p text:style-name="Text_20_body">GNU General Public License v3 (GPLv3)</text:p>
      <text:p text:style-name="Text_20_body">Permite:</text:p>
      <text:list text:style-name="L23">
        <text:list-item>
          <text:p text:style-name="P47">uso </text:p>
        </text:list-item>
        <text:list-item>
          <text:p text:style-name="P47">modificação </text:p>
        </text:list-item>
        <text:list-item>
          <text:p text:style-name="P48">redistribuição </text:p>
        </text:list-item>
      </text:list>
      <text:p text:style-name="Text_20_body">Desde que:</text:p>
      <text:list text:style-name="L24">
        <text:list-item>
          <text:p text:style-name="P49">mantenha a mesma licença </text:p>
        </text:list-item>
        <text:list-item>
          <text:p text:style-name="P50">disponibilize o código-fonte </text:p>
        </text:list-item>
      </text:list>
      <text:p text:style-name="Horizontal_20_Line"/>
      <text:h text:style-name="Heading_20_1" text:outline-level="1"><text:soft-page-break/>🌍 Filosofia do Projeto</text:h>
      <text:p text:style-name="Quotations">“Um sistema operacional transparente, modular e educacional, onde o usuário controla o próprio ambiente de execução.”</text:p>
      <text:p text:style-name="Horizontal_20_Line"/>
      <text:h text:style-name="Heading_20_1" text:outline-level="1">🚀 Futuro</text:h>
      <text:list text:style-name="L25">
        <text:list-item>
          <text:p text:style-name="P51">RAD GUI Builder </text:p>
        </text:list-item>
        <text:list-item>
          <text:p text:style-name="P51">Runtime IA avançado </text:p>
        </text:list-item>
        <text:list-item>
          <text:p text:style-name="P51">Multi-process IPC expandido </text:p>
        </text:list-item>
        <text:list-item>
          <text:p text:style-name="P51">Sistema de pacotes (.lbfpkg) </text:p>
        </text:list-item>
        <text:list-item>
          <text:p text:style-name="P52">Driver model modular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2:42:29.434839861</dc:date>
    <meta:editing-duration>PT14S</meta:editing-duration>
    <meta:editing-cycles>1</meta:editing-cycles>
    <meta:document-statistic meta:table-count="0" meta:image-count="0" meta:object-count="0" meta:page-count="8" meta:paragraph-count="216" meta:word-count="914" meta:character-count="5800" meta:non-whitespace-character-count="4827"/>
  </office:meta>
</office:document-meta>
</file>