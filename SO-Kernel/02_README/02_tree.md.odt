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rivers/</text:p>
      <text:p text:style-name="Standard">├── video.c</text:p>
      <text:p text:style-name="Standard">├── keyboard.c</text:p>
      <text:p text:style-name="Standard">├── mouse.c</text:p>
      <text:p text:style-name="Standard">├── timer.c</text:p>
      <text:p text:style-name="Standard">├── proc.c</text:p>
      <text:p text:style-name="Standard">├── syscall.c</text:p>
      <text:p text:style-name="Standard">├── desktop.c</text:p>
      <text:p text:style-name="Standard">├── apps.c</text:p>
      <text:p text:style-name="Standard">├── vfs.c</text:p>
      <text:p text:style-name="Standard">├── shell/</text:p>
      <text:p text:style-name="Standard">└── hw/</text:p>
      <text:p text:style-name="Standard"/>
      <text:p text:style-name="Standard">mem/</text:p>
      <text:p text:style-name="Standard">├── pmm.c</text:p>
      <text:p text:style-name="Standard">├── vmm.c</text:p>
      <text:p text:style-name="Standard">├── kmalloc.c</text:p>
      <text:p text:style-name="Standard">├── gdt.c</text:p>
      <text:p text:style-name="Standard">└── e820.c</text:p>
      <text:p text:style-name="Standard"/>
      <text:p text:style-name="Standard">fs/</text:p>
      <text:p text:style-name="Standard">├── fat32.c</text:p>
      <text:p text:style-name="Standard">├── fat32_logic.c</text:p>
      <text:p text:style-name="Standard">├── fat32_file.c</text:p>
      <text:p text:style-name="Standard">├── fat32_dir.c</text:p>
      <text:p text:style-name="Standard">└── fat32_xcopy.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6-19T20:11:43.012543526</dc:date>
    <meta:editing-duration>PT9S</meta:editing-duration>
    <meta:editing-cycles>1</meta:editing-cycles>
    <meta:document-statistic meta:table-count="0" meta:image-count="0" meta:object-count="0" meta:page-count="1" meta:paragraph-count="24" meta:word-count="45" meta:character-count="260" meta:non-whitespace-character-count="239"/>
  </office:meta>
</office:document-meta>
</file>