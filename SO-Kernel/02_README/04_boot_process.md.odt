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cesso de Inicialização</text:h>
      <text:h text:style-name="Heading_20_2" text:outline-level="2">Visão Geral</text:h>
      <text:p text:style-name="Text_20_body">O sistema operacional utiliza um processo de inicialização próprio dividido em múltiplas etapas.</text:p>
      <text:p text:style-name="Text_20_body">O objetivo é sair do ambiente legado de 16 bits fornecido pelo BIOS e alcançar o modo Longo (64 bits), onde o kernel principal é executado.</text:p>
      <text:p text:style-name="Text_20_body">Fluxo simplificado:</text:p>
      <text:p text:style-name="Text_20_body">boot.asm → kernel.asm → modo protegido (32 bits) → modo longo (64 bits) → kernel.c</text:p>
      <text:p text:style-name="Horizontal_20_Line"/>
      <text:h text:style-name="Heading_20_2" text:outline-level="2">Etapa 1 - boot.asm</text:h>
      <text:p text:style-name="Text_20_body">O arquivo boot.asm é carregado pelo BIOS.</text:p>
      <text:p text:style-name="Text_20_body">Responsabilidades:</text:p>
      <text:list text:style-name="L1">
        <text:list-item>
          <text:p text:style-name="P1">Executar em modo real (16 bits)</text:p>
        </text:list-item>
        <text:list-item>
          <text:p text:style-name="P1">Inicializar ambiente básico</text:p>
        </text:list-item>
        <text:list-item>
          <text:p text:style-name="P1">Carregar o kernel do disco para a memória</text:p>
        </text:list-item>
        <text:list-item>
          <text:p text:style-name="P1">Transferir controle para kernel.asm</text:p>
        </text:list-item>
      </text:list>
      <text:p text:style-name="Horizontal_20_Line"/>
      <text:h text:style-name="Heading_20_2" text:outline-level="2">Etapa 2 - kernel.asm</text:h>
      <text:p text:style-name="Text_20_body">Responsável pela preparação da arquitetura para execução do kernel.</text:p>
      <text:p text:style-name="Text_20_body">Funções principais:</text:p>
      <text:list text:style-name="L2">
        <text:list-item>
          <text:p text:style-name="P2">Configuração inicial da CPU</text:p>
        </text:list-item>
        <text:list-item>
          <text:p text:style-name="P2">Criação das estruturas necessárias para troca de modo</text:p>
        </text:list-item>
        <text:list-item>
          <text:p text:style-name="P2">Entrada no modo protegido (32 bits)</text:p>
        </text:list-item>
        <text:list-item>
          <text:p text:style-name="P2">Preparação para entrada no modo longo (64 bits)</text:p>
        </text:list-item>
      </text:list>
      <text:p text:style-name="Horizontal_20_Line"/>
      <text:h text:style-name="Heading_20_2" text:outline-level="2">Etapa 3 - Modo Protegido (32 bits)</text:h>
      <text:p text:style-name="Text_20_body">Nesta etapa o sistema deixa o modo real do BIOS.</text:p>
      <text:p text:style-name="Text_20_body">Funções:</text:p>
      <text:list text:style-name="L3">
        <text:list-item>
          <text:p text:style-name="P3">Inicialização das tabelas necessárias</text:p>
        </text:list-item>
        <text:list-item>
          <text:p text:style-name="P3">Preparação da memória</text:p>
        </text:list-item>
        <text:list-item>
          <text:p text:style-name="P3"><text:soft-page-break/>Configuração de estruturas de suporte ao modo longo</text:p>
        </text:list-item>
      </text:list>
      <text:p text:style-name="Horizontal_20_Line"/>
      <text:h text:style-name="Heading_20_2" text:outline-level="2">Etapa 4 - Modo Longo (64 bits)</text:h>
      <text:p text:style-name="Text_20_body">Após a ativação do modo longo:</text:p>
      <text:list text:style-name="L4">
        <text:list-item>
          <text:p text:style-name="P4">Registradores de 64 bits tornam-se disponíveis</text:p>
        </text:list-item>
        <text:list-item>
          <text:p text:style-name="P4">Endereçamento de 64 bits é habilitado</text:p>
        </text:list-item>
        <text:list-item>
          <text:p text:style-name="P4">O ambiente necessário para o kernel é preparado</text:p>
        </text:list-item>
      </text:list>
      <text:p text:style-name="Text_20_body">O controle é então transferido para o kernel escrito em C.</text:p>
      <text:p text:style-name="Horizontal_20_Line"/>
      <text:h text:style-name="Heading_20_2" text:outline-level="2">Etapa 5 - kernel.c</text:h>
      <text:p text:style-name="Text_20_body">O arquivo kernel.c é o ponto de entrada principal do sistema operacional.</text:p>
      <text:p text:style-name="Text_20_body">A partir deste ponto ocorre:</text:p>
      <text:list text:style-name="L5">
        <text:list-item>
          <text:p text:style-name="P5">Inicialização da GDT</text:p>
        </text:list-item>
        <text:list-item>
          <text:p text:style-name="P5">Inicialização da IDT</text:p>
        </text:list-item>
        <text:list-item>
          <text:p text:style-name="P5">Detecção de memória</text:p>
        </text:list-item>
        <text:list-item>
          <text:p text:style-name="P5">Inicialização do PMM</text:p>
        </text:list-item>
        <text:list-item>
          <text:p text:style-name="P5">Inicialização do VMM</text:p>
        </text:list-item>
        <text:list-item>
          <text:p text:style-name="P5">Inicialização dos drivers</text:p>
        </text:list-item>
        <text:list-item>
          <text:p text:style-name="P5">Inicialização do sistema de arquivos</text:p>
        </text:list-item>
        <text:list-item>
          <text:p text:style-name="P5">Inicialização do desktop ou shell</text:p>
        </text:list-item>
        <text:list-item>
          <text:p text:style-name="P5">Entrada no laço principal do kernel</text:p>
        </text:list-item>
      </text:list>
      <text:p text:style-name="Horizontal_20_Line"/>
      <text:h text:style-name="Heading_20_2" text:outline-level="2">Arquivos Gerados</text:h>
      <text:p text:style-name="Text_20_body">Durante o processo de compilação são produzidos:</text:p>
      <text:p text:style-name="Text_20_body">boot.bin<text:line-break/>Imagem do setor de boot.</text:p>
      <text:p text:style-name="Text_20_body">kernel.o<text:line-break/>Objetos intermediários.</text:p>
      <text:p text:style-name="Text_20_body">kernel.bin<text:line-break/>Imagem final do kernel utilizada pelo sistema operaciona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19T20:08:27.497281140</dc:date>
    <meta:editing-duration>PT10S</meta:editing-duration>
    <meta:editing-cycles>1</meta:editing-cycles>
    <meta:document-statistic meta:table-count="0" meta:image-count="0" meta:object-count="0" meta:page-count="2" meta:paragraph-count="49" meta:word-count="317" meta:character-count="1866" meta:non-whitespace-character-count="1621"/>
  </office:meta>
</office:document-meta>
</file>