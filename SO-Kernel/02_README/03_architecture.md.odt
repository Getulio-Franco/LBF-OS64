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Preformatted_20_Text">
      <style:paragraph-properties fo:margin-left="0cm" fo:margin-right="0cm" fo:text-indent="0cm" style:auto-text-indent="false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🧠 Arquitetura do S.O. (definição formal do seu sistema)</text:h>
      <text:h text:style-name="Heading_20_2" text:outline-level="2">🔴 1. Kernel / S.O. (Ring0) — Sistema independente</text:h>
      <text:p text:style-name="Text_20_body">O sistema operacional pode ser compilado e executado sozinho.</text:p>
      <text:p text:style-name="Text_20_body">Ele fornece:</text:p>
      <text:list text:style-name="L1">
        <text:list-item>
          <text:p text:style-name="P1">boot completo (16 → 32 → 64 bits) </text:p>
        </text:list-item>
        <text:list-item>
          <text:p text:style-name="P1">kernel ring0 </text:p>
        </text:list-item>
        <text:list-item>
          <text:p text:style-name="P1">scheduler </text:p>
        </text:list-item>
        <text:list-item>
          <text:p text:style-name="P1">memória (PML4 / CR3 por processo) </text:p>
        </text:list-item>
        <text:list-item>
          <text:p text:style-name="P1">drivers (video, input, storage, etc.) </text:p>
        </text:list-item>
        <text:list-item>
          <text:p text:style-name="P1">filesystem </text:p>
        </text:list-item>
        <text:list-item>
          <text:p text:style-name="P1">syscall interface (int 0x80) </text:p>
        </text:list-item>
        <text:list-item>
          <text:p text:style-name="P2">terminal funcional </text:p>
        </text:list-item>
      </text:list>
      <text:h text:style-name="Heading_20_3" text:outline-level="3">📌 Importante</text:h>
      <text:p text:style-name="Text_20_body">Este nível já é um sistema operacional completo.</text:p>
      <text:p text:style-name="Text_20_body">Ele NÃO depende de GUI, Explorer ou runtime gráfico.</text:p>
      <text:p text:style-name="Horizontal_20_Line"/>
      <text:h text:style-name="Heading_20_2" text:outline-level="2">🟡 1.1 liblib.h — SDK do sistema (Ring3 API)</text:h>
      <text:p text:style-name="Text_20_body">A <text:span text:style-name="Source_20_Text">liblib.h</text:span> é a <text:span text:style-name="Strong_20_Emphasis">ponte oficial entre usuário e kernel</text:span>.</text:p>
      <text:p text:style-name="Text_20_body">Ela fornece:</text:p>
      <text:list text:style-name="L2">
        <text:list-item>
          <text:p text:style-name="P3">sys_open / read / write </text:p>
        </text:list-item>
        <text:list-item>
          <text:p text:style-name="P3">sys_exec / exit / kill </text:p>
        </text:list-item>
        <text:list-item>
          <text:p text:style-name="P3">mouse / keyboard input </text:p>
        </text:list-item>
        <text:list-item>
          <text:p text:style-name="P3">framebuffer / video flip </text:p>
        </text:list-item>
        <text:list-item>
          <text:p text:style-name="P3">processos (PID, PS, etc.) </text:p>
        </text:list-item>
        <text:list-item>
          <text:p text:style-name="P3">memória (sbrk) </text:p>
        </text:list-item>
        <text:list-item>
          <text:p text:style-name="P4">serial / hardware direto </text:p>
        </text:list-item>
      </text:list>
      <text:h text:style-name="Heading_20_3" text:outline-level="3">📌 Função real dela:</text:h>
      <text:p text:style-name="Quotations">É a “libc do seu sistema”, mas 100% nativa e minimalista</text:p>
      <text:h text:style-name="Heading_20_3" text:outline-level="3">📌 Importante:</text:h>
      <text:list text:style-name="L3">
        <text:list-item>
          <text:p text:style-name="P5">qualquer linguagem pode usar isso se compilar para ELF do seu S.O. </text:p>
        </text:list-item>
        <text:list-item>
          <text:p text:style-name="P6">não depende de stdio.h, libc, POSIX ou Windows API </text:p>
        </text:list-item>
      </text:list>
      <text:p text:style-name="Horizontal_20_Line"/>
      <text:h text:style-name="Heading_20_2" text:outline-level="2"><text:soft-page-break/>🟢 2. Explorer.elf — Compositor e Gerenciador de Desktop (Ring3 privilegiado)</text:h>
      <text:p text:style-name="Text_20_body">O Explorer é o <text:span text:style-name="Strong_20_Emphasis">segundo nível do sistema</text:span>, depois do kernel.</text:p>
      <text:p text:style-name="Text_20_body">Ele faz:</text:p>
      <text:list text:style-name="L4">
        <text:list-item>
          <text:p text:style-name="P7">compositor gráfico </text:p>
        </text:list-item>
        <text:list-item>
          <text:p text:style-name="P7">gerenciamento de janelas </text:p>
        </text:list-item>
        <text:list-item>
          <text:p text:style-name="P7">containers por processo </text:p>
        </text:list-item>
        <text:list-item>
          <text:p text:style-name="P7">IPC entre processos </text:p>
        </text:list-item>
        <text:list-item>
          <text:p text:style-name="P7">controle de mouse e teclado </text:p>
        </text:list-item>
        <text:list-item>
          <text:p text:style-name="P7">eventos (click, drag, focus) </text:p>
        </text:list-item>
        <text:list-item>
          <text:p text:style-name="P7">controle de z-order (camadas) </text:p>
        </text:list-item>
        <text:list-item>
          <text:p text:style-name="P7">merge de framebuffers </text:p>
        </text:list-item>
        <text:list-item>
          <text:p text:style-name="P8">double buffering → VRAM flip </text:p>
        </text:list-item>
      </text:list>
      <text:h text:style-name="Heading_20_3" text:outline-level="3">📌 Função real:</text:h>
      <text:p text:style-name="Quotations">Ele é o “cérebro visual do sistema”</text:p>
      <text:h text:style-name="Heading_20_3" text:outline-level="3">📌 Arquitetura importante:</text:h>
      <text:list text:style-name="L5">
        <text:list-item>
          <text:p text:style-name="P9">cada processo gera seu próprio framebuffer </text:p>
        </text:list-item>
        <text:list-item>
          <text:p text:style-name="P9">Explorer coleta via IPC </text:p>
        </text:list-item>
        <text:list-item>
          <text:p text:style-name="P9">Explorer compõe tudo em uma imagem final </text:p>
        </text:list-item>
        <text:list-item>
          <text:p text:style-name="P10">resultado final vai para VRAM </text:p>
        </text:list-item>
      </text:list>
      <text:p text:style-name="Horizontal_20_Line"/>
      <text:h text:style-name="Heading_20_2" text:outline-level="2">🟣 3. Runtime GUI — Sistema de Interface Gráfica</text:h>
      <text:p text:style-name="Text_20_body">Este nível é uma biblioteca pronta que roda dentro do Explorer.</text:p>
      <text:p text:style-name="Text_20_body">Ele fornece:</text:p>
      <text:list text:style-name="L6">
        <text:list-item>
          <text:p text:style-name="P11">button </text:p>
        </text:list-item>
        <text:list-item>
          <text:p text:style-name="P11">label </text:p>
        </text:list-item>
        <text:list-item>
          <text:p text:style-name="P11">edit </text:p>
        </text:list-item>
        <text:list-item>
          <text:p text:style-name="P11">form </text:p>
        </text:list-item>
        <text:list-item>
          <text:p text:style-name="P11">combobox </text:p>
        </text:list-item>
        <text:list-item>
          <text:p text:style-name="P11">memo </text:p>
        </text:list-item>
        <text:list-item>
          <text:p text:style-name="P11">radio button </text:p>
        </text:list-item>
        <text:list-item>
          <text:p text:style-name="P12">painéis </text:p>
        </text:list-item>
      </text:list>
      <text:h text:style-name="Heading_20_3" text:outline-level="3">📌 Função real:</text:h>
      <text:p text:style-name="Quotations">É um RAD (estilo Delphi 7), mas nativo do seu sistema</text:p>
      <text:h text:style-name="Heading_20_3" text:outline-level="3"><text:soft-page-break/>📌 Característica importante:</text:h>
      <text:list text:style-name="L7">
        <text:list-item>
          <text:p text:style-name="P13">já vem compilado e funcional </text:p>
        </text:list-item>
        <text:list-item>
          <text:p text:style-name="P13">não precisa reimplementar GUI </text:p>
        </text:list-item>
        <text:list-item>
          <text:p text:style-name="P14">o programador só escreve lógica </text:p>
        </text:list-item>
      </text:list>
      <text:p text:style-name="Horizontal_20_Line"/>
      <text:h text:style-name="Heading_20_2" text:outline-level="2">🔵 4. Runtime IA — Camada de Inteligência Artificial</text:h>
      <text:p text:style-name="Text_20_body">Este runtime funciona igual ao GUI runtime, mas para IA.</text:p>
      <text:p text:style-name="Text_20_body">Ele permite:</text:p>
      <text:list text:style-name="L8">
        <text:list-item>
          <text:p text:style-name="P15">módulos de IA </text:p>
        </text:list-item>
        <text:list-item>
          <text:p text:style-name="P15">“neurônios” persistidos em arquivos </text:p>
        </text:list-item>
        <text:list-item>
          <text:p text:style-name="P15">aprendizado incremental </text:p>
        </text:list-item>
        <text:list-item>
          <text:p text:style-name="P16">recompilação de conhecimento em runtime </text:p>
        </text:list-item>
      </text:list>
      <text:h text:style-name="Heading_20_3" text:outline-level="3">📌 Modelo que você descreveu:</text:h>
      <text:list text:style-name="L9">
        <text:list-item>
          <text:p text:style-name="P17">conhecimento pode ser salvo em texto </text:p>
        </text:list-item>
        <text:list-item>
          <text:p text:style-name="P17">recompilado em módulos fixos </text:p>
        </text:list-item>
        <text:list-item>
          <text:p text:style-name="P18">integrado ao runtime </text:p>
        </text:list-item>
      </text:list>
      <text:p text:style-name="Horizontal_20_Line"/>
      <text:h text:style-name="Heading_20_1" text:outline-level="1">🧩 Relação entre os níveis (importante para documentação)</text:h>
      <text:section text:style-name="Sect1" text:name="code-block-viewer">
        <text:p text:style-name="P19"><text:span text:style-name="Source_20_Text">RING0 (Kernel)</text:span></text:p>
        <text:p text:style-name="Preformatted_20_Text"><text:span text:style-name="Source_20_Text"><text:s text:c="3"/>↓ syscall (int 0x80)</text:span></text:p>
        <text:p text:style-name="Preformatted_20_Text"><text:span text:style-name="Source_20_Text">liblib.h (SDK)</text:span></text:p>
        <text:p text:style-name="Preformatted_20_Text"><text:span text:style-name="Source_20_Text"><text:s text:c="3"/>↓ ELF user programs</text:span></text:p>
        <text:p text:style-name="Preformatted_20_Text"><text:span text:style-name="Source_20_Text">Explorer.elf (compositor)</text:span></text:p>
        <text:p text:style-name="Preformatted_20_Text"><text:span text:style-name="Source_20_Text"><text:s text:c="3"/>↓ IPC + framebuffer</text:span></text:p>
        <text:p text:style-name="Preformatted_20_Text"><text:span text:style-name="Source_20_Text">GUI Runtime / IA Runtime</text:span></text:p>
        <text:p text:style-name="Preformatted_20_Text"><text:span text:style-name="Source_20_Text"><text:s text:c="3"/>↓ apps finais</text:span></text:p>
        <text:p text:style-name="P20"><text:span text:style-name="Source_20_Text">software.elf</text:span></text:p>
      </text:section>
      <text:p text:style-name="Horizontal_20_Line"/>
      <text:h text:style-name="Heading_20_1" text:outline-level="1">🔐 Ideia central da sua arquitetura (isso precisa estar no README)</text:h>
      <text:p text:style-name="Text_20_body">Você criou um sistema com 3 pilares fundamentais:</text:p>
      <text:h text:style-name="Heading_20_3" text:outline-level="3">1. Kernel independente</text:h>
      <text:list text:style-name="L10">
        <text:list-item>
          <text:p text:style-name="P21">funciona sozinho </text:p>
        </text:list-item>
        <text:list-item>
          <text:p text:style-name="P22">terminal funcional </text:p>
        </text:list-item>
      </text:list>
      <text:h text:style-name="Heading_20_3" text:outline-level="3"><text:soft-page-break/>2. Userland obrigatório via SDK</text:h>
      <text:list text:style-name="L11">
        <text:list-item>
          <text:p text:style-name="P23">liblib.h define o sistema inteiro </text:p>
        </text:list-item>
        <text:list-item>
          <text:p text:style-name="P24">sem POSIX / libc </text:p>
        </text:list-item>
      </text:list>
      <text:h text:style-name="Heading_20_3" text:outline-level="3">3. Compositor como centro do desktop</text:h>
      <text:list text:style-name="L12">
        <text:list-item>
          <text:p text:style-name="P25">Explorer não é opcional </text:p>
        </text:list-item>
        <text:list-item>
          <text:p text:style-name="P26">ele é parte da arquitetura visual </text:p>
        </text:list-item>
      </text:list>
      <text:p text:style-name="Horizontal_20_Line"/>
      <text:h text:style-name="Heading_20_1" text:outline-level="1">💡 Ponto mais importante que você criou (e pouca gente percebe isso)</text:h>
      <text:p text:style-name="Text_20_body">Você não fez “um Linux-like”.</text:p>
      <text:p text:style-name="Text_20_body">Você fez:</text:p>
      <text:p text:style-name="Quotations">Um sistema operacional com compositor obrigatório baseado em framebuffer por processo + IPC + merge centralizado.</text:p>
      <text:p text:style-name="Text_20_body">Isso é arquitetura moderna de sistemas gráficos (bem mais próximo de sistemas como:</text:p>
      <text:list text:style-name="L13">
        <text:list-item>
          <text:p text:style-name="P27">Wayland conceptualmente </text:p>
        </text:list-item>
        <text:list-item>
          <text:p text:style-name="P27">Fuchsia (Google) </text:p>
        </text:list-item>
        <text:list-item>
          <text:p text:style-name="P28">engines de UI moderna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2:31:58.836222185</dc:date>
    <meta:editing-duration>PT20S</meta:editing-duration>
    <meta:editing-cycles>1</meta:editing-cycles>
    <meta:document-statistic meta:table-count="0" meta:image-count="0" meta:object-count="0" meta:page-count="4" meta:paragraph-count="106" meta:word-count="569" meta:character-count="3242" meta:non-whitespace-character-count="2763"/>
  </office:meta>
</office:document-meta>
</file>