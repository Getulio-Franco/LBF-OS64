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elo de Containers do Sistema</text:h>
      <text:h text:style-name="Heading_20_2" text:outline-level="2">Descrição</text:h>
      <text:p text:style-name="Text_20_body">No sistema operacional, toda aplicação gráfica executada no ambiente Ring3 não é inserida diretamente no desktop.</text:p>
      <text:p text:style-name="Text_20_body">Em vez disso, cada aplicação é encapsulada em um <text:span text:style-name="Strong_20_Emphasis">container gerenciado pelo Explorer.elf</text:span>.</text:p>
      <text:p text:style-name="Text_20_body">O container é a unidade fundamental de representação visual, lógica e de interação de uma aplicação dentro do ambiente gráfico.</text:p>
      <text:p text:style-name="Horizontal_20_Line"/>
      <text:h text:style-name="Heading_20_2" text:outline-level="2">Conceito Central</text:h>
      <text:p text:style-name="Text_20_body">Cada <text:span text:style-name="Source_20_Text">software.elf</text:span> não existe diretamente na área de trabalho.</text:p>
      <text:p text:style-name="Text_20_body">Ele existe dentro de um container criado e controlado pelo Explorer.elf.</text:p>
      <text:p text:style-name="Text_20_body">Estrutura simplificada:</text:p>
      <text:p text:style-name="P1"><text:span text:style-name="Source_20_Text">software.elf → container → desktop (Explorer.elf)</text:span></text:p>
      <text:p text:style-name="Horizontal_20_Line"/>
      <text:h text:style-name="Heading_20_2" text:outline-level="2">Estrutura do Container</text:h>
      <text:p text:style-name="Text_20_body">Um container representa a instância visual de uma aplicação e contém todas as informações necessárias para sua execução dentro do ambiente gráfico.</text:p>
      <text:p text:style-name="Text_20_body">Ele pode ser representado conceitualmente por:</text:p>
      <text:p text:style-name="Preformatted_20_Text"><text:span text:style-name="Source_20_Text">typedef struct</text:span></text:p>
      <text:p text:style-name="Preformatted_20_Text"><text:span text:style-name="Source_20_Text">{</text:span></text:p>
      <text:p text:style-name="Preformatted_20_Text"><text:span text:style-name="Source_20_Text"><text:s text:c="4"/>int id;</text:span></text:p>
      <text:p text:style-name="Preformatted_20_Text"/>
      <text:p text:style-name="Preformatted_20_Text"><text:span text:style-name="Source_20_Text"><text:s text:c="4"/>int x;</text:span></text:p>
      <text:p text:style-name="Preformatted_20_Text"><text:span text:style-name="Source_20_Text"><text:s text:c="4"/>int y;</text:span></text:p>
      <text:p text:style-name="Preformatted_20_Text"/>
      <text:p text:style-name="Preformatted_20_Text"><text:span text:style-name="Source_20_Text"><text:s text:c="4"/>int width;</text:span></text:p>
      <text:p text:style-name="Preformatted_20_Text"><text:span text:style-name="Source_20_Text"><text:s text:c="4"/>int height;</text:span></text:p>
      <text:p text:style-name="Preformatted_20_Text"/>
      <text:p text:style-name="Preformatted_20_Text"><text:span text:style-name="Source_20_Text"><text:s text:c="4"/>int z_order;</text:span></text:p>
      <text:p text:style-name="Preformatted_20_Text"/>
      <text:p text:style-name="Preformatted_20_Text"><text:span text:style-name="Source_20_Text"><text:s text:c="4"/>bool visible;</text:span></text:p>
      <text:p text:style-name="Preformatted_20_Text"><text:span text:style-name="Source_20_Text"><text:s text:c="4"/>bool focused;</text:span></text:p>
      <text:p text:style-name="Preformatted_20_Text"/>
      <text:p text:style-name="Preformatted_20_Text"><text:span text:style-name="Source_20_Text"><text:s text:c="4"/>uint32_t* rambuffer;</text:span></text:p>
      <text:p text:style-name="Preformatted_20_Text"/>
      <text:p text:style-name="Preformatted_20_Text"><text:span text:style-name="Source_20_Text"><text:s text:c="4"/>process_t* process;</text:span></text:p>
      <text:p text:style-name="Preformatted_20_Text"/>
      <text:p text:style-name="P1"><text:span text:style-name="Source_20_Text">} container_t;</text:span></text:p>
      <text:p text:style-name="Horizontal_20_Line"/>
      <text:h text:style-name="Heading_20_2" text:outline-level="2"><text:soft-page-break/>Responsabilidades do Container</text:h>
      <text:p text:style-name="Text_20_body">Cada container possui responsabilidades diretas sobre a representação da aplicação no sistema:</text:p>
      <text:h text:style-name="Heading_20_3" text:outline-level="3">1. Posição e Dimensão</text:h>
      <text:list text:style-name="L1">
        <text:list-item>
          <text:p text:style-name="P2">Controle de posição (X, Y)</text:p>
        </text:list-item>
        <text:list-item>
          <text:p text:style-name="P2">Controle de largura e altura</text:p>
        </text:list-item>
        <text:list-item>
          <text:p text:style-name="P2">Redimensionamento via Explorer.elf</text:p>
        </text:list-item>
      </text:list>
      <text:p text:style-name="Horizontal_20_Line"/>
      <text:h text:style-name="Heading_20_3" text:outline-level="3">2. Profundidade (Z-Order)</text:h>
      <text:list text:style-name="L2">
        <text:list-item>
          <text:p text:style-name="P3">Define a ordem de sobreposição no desktop</text:p>
        </text:list-item>
        <text:list-item>
          <text:p text:style-name="P3">Determina qual container está visível acima de outro</text:p>
        </text:list-item>
      </text:list>
      <text:p text:style-name="Horizontal_20_Line"/>
      <text:h text:style-name="Heading_20_3" text:outline-level="3">3. Estado Visual</text:h>
      <text:list text:style-name="L3">
        <text:list-item>
          <text:p text:style-name="P4">Visível ou oculto</text:p>
        </text:list-item>
        <text:list-item>
          <text:p text:style-name="P4">Ativo ou inativo</text:p>
        </text:list-item>
        <text:list-item>
          <text:p text:style-name="P4">Com foco ou sem foco</text:p>
        </text:list-item>
      </text:list>
      <text:p text:style-name="Horizontal_20_Line"/>
      <text:h text:style-name="Heading_20_3" text:outline-level="3">4. Buffer Gráfico (RamBuffer)</text:h>
      <text:list text:style-name="L4">
        <text:list-item>
          <text:p text:style-name="P5">Cada container possui um buffer gráfico próprio</text:p>
        </text:list-item>
        <text:list-item>
          <text:p text:style-name="P5">A aplicação desenha exclusivamente dentro deste buffer</text:p>
        </text:list-item>
        <text:list-item>
          <text:p text:style-name="P5">Nenhuma aplicação escreve diretamente na VRAM</text:p>
        </text:list-item>
      </text:list>
      <text:p text:style-name="Horizontal_20_Line"/>
      <text:h text:style-name="Heading_20_3" text:outline-level="3">5. Associação com Processo</text:h>
      <text:list text:style-name="L5">
        <text:list-item>
          <text:p text:style-name="P6">Cada container está vinculado a um processo ELF ativo</text:p>
        </text:list-item>
        <text:list-item>
          <text:p text:style-name="P6">O container representa visualmente esse processo no desktop</text:p>
        </text:list-item>
      </text:list>
      <text:p text:style-name="Horizontal_20_Line"/>
      <text:h text:style-name="Heading_20_2" text:outline-level="2">Ciclo de Vida de um Container</text:h>
      <text:h text:style-name="Heading_20_3" text:outline-level="3">1. Criação</text:h>
      <text:p text:style-name="Text_20_body">Quando um <text:span text:style-name="Source_20_Text">software.elf</text:span> é executado:</text:p>
      <text:p text:style-name="P1"><text:span text:style-name="Source_20_Text">Explorer.elf cria um container</text:span></text:p>
      <text:p text:style-name="Text_20_body">Em seguida:</text:p>
      <text:list text:style-name="L6">
        <text:list-item>
          <text:p text:style-name="P7"><text:soft-page-break/>Aloca memória para o buffer gráfico</text:p>
        </text:list-item>
        <text:list-item>
          <text:p text:style-name="P7">Associa o processo ELF ao container</text:p>
        </text:list-item>
        <text:list-item>
          <text:p text:style-name="P7">Registra o container na lista do desktop</text:p>
        </text:list-item>
      </text:list>
      <text:p text:style-name="Horizontal_20_Line"/>
      <text:h text:style-name="Heading_20_3" text:outline-level="3">2. Execução</text:h>
      <text:p text:style-name="Text_20_body">Durante a execução:</text:p>
      <text:list text:style-name="L7">
        <text:list-item>
          <text:p text:style-name="P8">A aplicação desenha no seu RamBuffer</text:p>
        </text:list-item>
        <text:list-item>
          <text:p text:style-name="P8">Recebe eventos de entrada (mouse, teclado)</text:p>
        </text:list-item>
        <text:list-item>
          <text:p text:style-name="P8">Opera isoladamente dentro do container</text:p>
        </text:list-item>
      </text:list>
      <text:p text:style-name="Horizontal_20_Line"/>
      <text:h text:style-name="Heading_20_3" text:outline-level="3">3. Gerenciamento</text:h>
      <text:p text:style-name="Text_20_body">O Explorer.elf controla continuamente:</text:p>
      <text:list text:style-name="L8">
        <text:list-item>
          <text:p text:style-name="P9">posição da janela</text:p>
        </text:list-item>
        <text:list-item>
          <text:p text:style-name="P9">foco de entrada</text:p>
        </text:list-item>
        <text:list-item>
          <text:p text:style-name="P9">profundidade (Z-order)</text:p>
        </text:list-item>
        <text:list-item>
          <text:p text:style-name="P9">visibilidade</text:p>
        </text:list-item>
        <text:list-item>
          <text:p text:style-name="P9">eventos de interação</text:p>
        </text:list-item>
      </text:list>
      <text:p text:style-name="Horizontal_20_Line"/>
      <text:h text:style-name="Heading_20_3" text:outline-level="3">4. Encerramento</text:h>
      <text:p text:style-name="Text_20_body">Quando o processo termina:</text:p>
      <text:list text:style-name="L9">
        <text:list-item>
          <text:p text:style-name="P10">o container é destruído</text:p>
        </text:list-item>
        <text:list-item>
          <text:p text:style-name="P10">o buffer gráfico é liberado</text:p>
        </text:list-item>
        <text:list-item>
          <text:p text:style-name="P10">o registro do desktop é removido</text:p>
        </text:list-item>
      </text:list>
      <text:p text:style-name="Horizontal_20_Line"/>
      <text:h text:style-name="Heading_20_2" text:outline-level="2">Relação com o Explorer.elf</text:h>
      <text:p text:style-name="Text_20_body">O Explorer.elf atua como o <text:span text:style-name="Strong_20_Emphasis">gerenciador central de containers do sistema</text:span>.</text:p>
      <text:p text:style-name="Text_20_body">Ele é responsável por:</text:p>
      <text:list text:style-name="L10">
        <text:list-item>
          <text:p text:style-name="P11">criar containers</text:p>
        </text:list-item>
        <text:list-item>
          <text:p text:style-name="P11">destruir containers</text:p>
        </text:list-item>
        <text:list-item>
          <text:p text:style-name="P11">atualizar posição e estado</text:p>
        </text:list-item>
        <text:list-item>
          <text:p text:style-name="P11">gerenciar foco e entrada</text:p>
        </text:list-item>
        <text:list-item>
          <text:p text:style-name="P11"><text:soft-page-break/>organizar Z-order</text:p>
        </text:list-item>
        <text:list-item>
          <text:p text:style-name="P11">compor a imagem final do desktop</text:p>
        </text:list-item>
      </text:list>
      <text:p text:style-name="Horizontal_20_Line"/>
      <text:h text:style-name="Heading_20_2" text:outline-level="2">Pipeline Gráfico</text:h>
      <text:p text:style-name="Text_20_body">O sistema gráfico segue o seguinte fluxo:</text:p>
      <text:p text:style-name="Preformatted_20_Text"><text:span text:style-name="Source_20_Text">Aplicação (software.elf)</text:span></text:p>
      <text:p text:style-name="Preformatted_20_Text"><text:span text:style-name="Source_20_Text"><text:s text:c="8"/>↓</text:span></text:p>
      <text:p text:style-name="Preformatted_20_Text"><text:span text:style-name="Source_20_Text"><text:s text:c="5"/>Container</text:span></text:p>
      <text:p text:style-name="Preformatted_20_Text"><text:span text:style-name="Source_20_Text"><text:s text:c="8"/>↓</text:span></text:p>
      <text:p text:style-name="Preformatted_20_Text"><text:span text:style-name="Source_20_Text"><text:s text:c="3"/>RamBuffer</text:span></text:p>
      <text:p text:style-name="Preformatted_20_Text"><text:span text:style-name="Source_20_Text"><text:s text:c="8"/>↓</text:span></text:p>
      <text:p text:style-name="Preformatted_20_Text"><text:span text:style-name="Source_20_Text"><text:s text:c="3"/>Explorer.elf (Compositor)</text:span></text:p>
      <text:p text:style-name="Preformatted_20_Text"><text:span text:style-name="Source_20_Text"><text:s text:c="8"/>↓</text:span></text:p>
      <text:p text:style-name="Preformatted_20_Text"><text:span text:style-name="Source_20_Text"><text:s/>BackBuffer Global</text:span></text:p>
      <text:p text:style-name="Preformatted_20_Text"><text:span text:style-name="Source_20_Text"><text:s text:c="8"/>↓</text:span></text:p>
      <text:p text:style-name="Preformatted_20_Text"><text:span text:style-name="Source_20_Text"><text:s text:c="3"/>video_flip()</text:span></text:p>
      <text:p text:style-name="Preformatted_20_Text"><text:span text:style-name="Source_20_Text"><text:s text:c="8"/>↓</text:span></text:p>
      <text:p text:style-name="P1"><text:span text:style-name="Source_20_Text"><text:s text:c="7"/>VRAM</text:span></text:p>
      <text:p text:style-name="Horizontal_20_Line"/>
      <text:h text:style-name="Heading_20_2" text:outline-level="2">Interação com Entrada (Input)</text:h>
      <text:p text:style-name="Text_20_body">Eventos de entrada são processados pelo Explorer.elf e roteados para o container ativo:</text:p>
      <text:list text:style-name="L11">
        <text:list-item>
          <text:p text:style-name="P12">Mouse move</text:p>
        </text:list-item>
        <text:list-item>
          <text:p text:style-name="P12">Click</text:p>
        </text:list-item>
        <text:list-item>
          <text:p text:style-name="P12">Drag</text:p>
        </text:list-item>
        <text:list-item>
          <text:p text:style-name="P12">Keyboard input</text:p>
        </text:list-item>
      </text:list>
      <text:p text:style-name="Text_20_body">O Explorer determina qual container deve receber cada evento com base em:</text:p>
      <text:list text:style-name="L12">
        <text:list-item>
          <text:p text:style-name="P13">foco atual</text:p>
        </text:list-item>
        <text:list-item>
          <text:p text:style-name="P13">posição do cursor</text:p>
        </text:list-item>
        <text:list-item>
          <text:p text:style-name="P13">profundidade (Z-order)</text:p>
        </text:list-item>
      </text:list>
      <text:p text:style-name="Horizontal_20_Line"/>
      <text:h text:style-name="Heading_20_2" text:outline-level="2">Importância Arquitetural</text:h>
      <text:p text:style-name="Text_20_body">O modelo de containers garante:</text:p>
      <text:list text:style-name="L13">
        <text:list-item>
          <text:p text:style-name="P14">isolamento entre aplicações</text:p>
        </text:list-item>
        <text:list-item>
          <text:p text:style-name="P14">controle centralizado da interface gráfica</text:p>
        </text:list-item>
        <text:list-item>
          <text:p text:style-name="P14">independência entre kernel e GUI</text:p>
        </text:list-item>
        <text:list-item>
          <text:p text:style-name="P14">flexibilidade para múltiplos tipos de aplicações</text:p>
        </text:list-item>
        <text:list-item>
          <text:p text:style-name="P14"><text:soft-page-break/>estrutura escalável para o sistema operacional</text:p>
        </text:list-item>
      </text:list>
      <text:p text:style-name="Horizontal_20_Line"/>
      <text:h text:style-name="Heading_20_2" text:outline-level="2">Resumo</text:h>
      <text:p text:style-name="Text_20_body">O container é a unidade fundamental do ambiente gráfico.</text:p>
      <text:p text:style-name="Text_20_body">Ele conecta:</text:p>
      <text:list text:style-name="L14">
        <text:list-item>
          <text:p text:style-name="P15">Processo (ELF)</text:p>
        </text:list-item>
        <text:list-item>
          <text:p text:style-name="P15">Interface gráfica (RamBuffer)</text:p>
        </text:list-item>
        <text:list-item>
          <text:p text:style-name="P15">Estado da janela</text:p>
        </text:list-item>
        <text:list-item>
          <text:p text:style-name="P15">Entrada do usuário</text:p>
        </text:list-item>
        <text:list-item>
          <text:p text:style-name="P15">Gerenciamento do Explorer.elf</text:p>
        </text:list-item>
      </text:list>
      <text:p text:style-name="Text_20_body">Sem o container, o sistema não possui representação visual das aplicações.</text:p>
      <text:p text:style-name="Text_20_body">Com ele, o sistema passa a operar como um ambiente gráfico completo e organizad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6-19T20:37:05.667794805</dc:date>
    <meta:editing-duration>PT10S</meta:editing-duration>
    <meta:editing-cycles>1</meta:editing-cycles>
    <meta:document-statistic meta:table-count="0" meta:image-count="0" meta:object-count="0" meta:page-count="5" meta:paragraph-count="122" meta:word-count="588" meta:character-count="3750" meta:non-whitespace-character-count="3224"/>
  </office:meta>
</office:document-meta>
</file>